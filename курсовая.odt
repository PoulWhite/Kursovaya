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B00000149F8E2F9B8.png" manifest:media-type="image/png"/>
  <manifest:file-entry manifest:full-path="Pictures/10000001000003340000031669205A5B.png" manifest:media-type="image/png"/>
  <manifest:file-entry manifest:full-path="Pictures/100000010000025B000001D6A176FB4A.png" manifest:media-type="image/png"/>
  <manifest:file-entry manifest:full-path="Pictures/10000001000003620000031EF8BE9D40.png" manifest:media-type="image/png"/>
  <manifest:file-entry manifest:full-path="Pictures/100000010000028D0000024311404570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/>
    <style:font-face style:name="Times new roman3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Таблица2" style:family="table" style:master-page-name="First_20_Page">
      <style:table-properties style:width="16.882cm" fo:margin-left="-0.191cm" fo:margin-top="0cm" fo:margin-bottom="0cm" style:page-number="auto" table:align="left" style:writing-mode="page"/>
    </style:style>
    <style:style style:name="Таблица2.A" style:family="table-column">
      <style:table-column-properties style:column-width="4.634cm"/>
    </style:style>
    <style:style style:name="Таблица2.B" style:family="table-column">
      <style:table-column-properties style:column-width="12.2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8.204cm"/>
    </style:style>
    <style:style style:name="Таблица3.B" style:family="table-column">
      <style:table-column-properties style:column-width="8.29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001cm" style:rel-column-width="19863*"/>
    </style:style>
    <style:style style:name="Таблица1.B" style:family="table-column">
      <style:table-column-properties style:column-width="5.999cm" style:rel-column-width="23827*"/>
    </style:style>
    <style:style style:name="Таблица1.C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5" style:family="table-row">
      <style:table-row-properties style:min-row-height="0.407cm"/>
    </style:style>
    <style:style style:name="P1" style:family="paragraph" style:parent-style-name="Standard">
      <style:paragraph-properties fo:margin-top="0cm" fo:margin-bottom="0cm" style:contextual-spacing="true" fo:line-height="150%" fo:text-align="center" style:justify-single-word="false" fo:hyphenation-ladder-count="no-limit" fo:hyphenation-keep="auto" loext:hyphenation-keep-type="column" loext:hyphenation-keep-line="false" style:vertical-align="baseline"/>
      <style:text-properties officeooo:paragraph-rsid="002d06d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hyphenation-ladder-count="no-limit" fo:hyphenation-keep="auto" loext:hyphenation-keep-type="column" loext:hyphenation-keep-line="false" style:vertical-align="baseline"/>
      <style:text-properties officeooo:paragraph-rsid="002d06d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paragraph-rsid="002d06df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d06df" officeooo:paragraph-rsid="002d06d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rsid="002e11c5" officeooo:paragraph-rsid="002e11c5" style:font-size-asian="12.25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loext:word-spacing-minimum="75%" loext:word-spacing-maximum="133%"/>
      <style:text-properties style:font-name="Times New Roman" fo:font-size="14pt" fo:language="ru" fo:country="RU" fo:font-weight="bold" officeooo:paragraph-rsid="002e11c5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Calibri" fo:font-size="11pt" fo:language="ru" fo:country="RU" officeooo:paragraph-rsid="002e11c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Times New Roman" fo:font-size="14pt" fo:language="ru" fo:country="RU" officeooo:paragraph-rsid="002e11c5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Calibri" fo:font-size="11pt" fo:language="ru" fo:country="RU" officeooo:rsid="002ebbad" officeooo:paragraph-rsid="002ebba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Heading_20_1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rsid="003003d1" officeooo:paragraph-rsid="003003d1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Содержание_20_курсовой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center" style:justify-single-word="false" style:writing-mode="lr-tb" loext:word-spacing-minimum="75%" loext:word-spacing-maximum="133%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style:writing-mode="lr-tb"/>
      <style:text-properties officeooo:paragraph-rsid="0036df5f"/>
    </style:style>
    <style:style style:name="P17" style:family="paragraph" style:parent-style-name="Text_20_body">
      <style:paragraph-properties style:writing-mode="lr-tb"/>
    </style:style>
    <style:style style:name="P18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</style:style>
    <style:style style:name="P1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style:text-underline-style="none" fo:background-color="transparent"/>
    </style:style>
    <style:style style:name="P20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fo:break-before="page" style:writing-mode="lr-tb"/>
    </style:style>
    <style:style style:name="P21" style:family="paragraph" style:parent-style-name="Text_20_body">
      <style:paragraph-properties style:writing-mode="lr-tb"/>
      <style:text-properties officeooo:rsid="003003d1" officeooo:paragraph-rsid="003003d1"/>
    </style:style>
    <style:style style:name="P22" style:family="paragraph" style:parent-style-name="Text_20_body">
      <style:paragraph-properties style:writing-mode="lr-tb"/>
      <style:text-properties officeooo:paragraph-rsid="002785f6"/>
    </style:style>
    <style:style style:name="P23" style:family="paragraph">
      <style:paragraph-properties fo:margin-left="0.178cm" fo:margin-right="0.178cm" fo:margin-top="0.175cm" fo:margin-bottom="0cm" fo:line-height="100%" fo:text-align="start" fo:text-indent="0cm" style:punctuation-wrap="simple" style:writing-mode="lr-tb"/>
    </style:style>
    <style:style style:name="P24" style:family="paragraph" style:parent-style-name="Text_20_body" style:list-style-name="WWNum3">
      <style:paragraph-properties style:writing-mode="lr-tb"/>
    </style:style>
    <style:style style:name="P25" style:family="paragraph" style:parent-style-name="Heading_20_1" style:list-style-name="">
      <style:paragraph-properties fo:margin-left="0cm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1" style:list-style-name="WWNum1">
      <style:paragraph-properties fo:margin-left="0cm" fo:text-indent="0cm" style:auto-text-indent="false" fo:break-before="page" style:writing-mode="lr-tb"/>
    </style:style>
    <style:style style:name="P27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fo:background-color="transparent" style:font-weight-asian="normal" style:font-weight-complex="normal"/>
    </style:style>
    <style:style style:name="P28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</style:style>
    <style:style style:name="P29" style:family="paragraph" style:parent-style-name="Text_20_body" style:list-style-name="WWNum4">
      <style:paragraph-properties style:writing-mode="lr-tb"/>
    </style:style>
    <style:style style:name="P30" style:family="paragraph" style:parent-style-name="Text_20_body" style:list-style-name="WWNum5">
      <style:paragraph-properties style:writing-mode="lr-tb"/>
    </style:style>
    <style:style style:name="P31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style:font-weight-asian="normal" style:font-weight-complex="normal"/>
    </style:style>
    <style:style style:name="P33" style:family="paragraph" style:parent-style-name="Text_20_body" style:list-style-name="WWNum6">
      <style:paragraph-properties style:writing-mode="lr-tb"/>
    </style:style>
    <style:style style:name="P34" style:family="paragraph" style:parent-style-name="Text_20_body">
      <style:paragraph-properties fo:margin-left="0cm" fo:text-indent="0cm" style:auto-text-indent="false" style:writing-mode="lr-tb"/>
      <style:text-properties fo:font-weight="normal" style:font-weight-asian="normal" style:font-weight-complex="normal"/>
    </style:style>
    <style:style style:name="P35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1.251cm" style:auto-text-indent="false" fo:break-before="page" style:writing-mode="lr-tb"/>
    </style:style>
    <style:style style:name="P36" style:family="paragraph" style:parent-style-name="Text_20_body">
      <style:paragraph-properties fo:margin-left="0cm" fo:margin-top="0cm" fo:margin-bottom="0.212cm" style:contextual-spacing="false" fo:text-align="start" style:justify-single-word="false" fo:text-indent="1.251cm" style:auto-text-indent="false" style:writing-mode="lr-tb"/>
    </style:style>
    <style:style style:name="P37" style:family="paragraph" style:parent-style-name="Text_20_body">
      <style:paragraph-properties style:writing-mode="lr-tb"/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P38" style:family="paragraph" style:parent-style-name="Text_20_body">
      <style:text-properties officeooo:paragraph-rsid="001e7ed2"/>
    </style:style>
    <style:style style:name="P39" style:family="paragraph" style:parent-style-name="Heading_20_2">
      <style:paragraph-properties fo:break-before="page"/>
      <style:text-properties officeooo:paragraph-rsid="001e7ed2"/>
    </style:style>
    <style:style style:name="P40" style:family="paragraph" style:parent-style-name="Heading_20_2">
      <style:text-properties officeooo:paragraph-rsid="001ed149"/>
    </style:style>
    <style:style style:name="P41" style:family="paragraph" style:parent-style-name="Text_20_body">
      <style:text-properties officeooo:paragraph-rsid="001ed149"/>
    </style:style>
    <style:style style:name="P42" style:family="paragraph" style:parent-style-name="Text_20_body" style:list-style-name="L1"/>
    <style:style style:name="P43" style:family="paragraph" style:parent-style-name="Heading_20_2">
      <style:text-properties officeooo:paragraph-rsid="0020edcf"/>
    </style:style>
    <style:style style:name="P44" style:family="paragraph" style:parent-style-name="Text_20_body">
      <style:text-properties officeooo:paragraph-rsid="0020edcf"/>
    </style:style>
    <style:style style:name="P45" style:family="paragraph" style:parent-style-name="Table">
      <style:paragraph-properties fo:keep-with-next="always"/>
    </style:style>
    <style:style style:name="P46" style:family="paragraph" style:parent-style-name="Table_20_Contents">
      <style:paragraph-properties fo:text-align="center" style:justify-single-word="false"/>
      <style:text-properties officeooo:rsid="0020edcf" officeooo:paragraph-rsid="0020edcf"/>
    </style:style>
    <style:style style:name="P47" style:family="paragraph" style:parent-style-name="Table_20_Contents">
      <style:text-properties officeooo:rsid="0020edcf" officeooo:paragraph-rsid="0020edcf"/>
    </style:style>
    <style:style style:name="P48" style:family="paragraph" style:parent-style-name="Table_20_Contents">
      <style:paragraph-properties fo:text-align="center" style:justify-single-word="false"/>
      <style:text-properties officeooo:rsid="00218bc6" officeooo:paragraph-rsid="00218bc6"/>
    </style:style>
    <style:style style:name="P49" style:family="paragraph" style:parent-style-name="Table_20_Contents">
      <style:paragraph-properties fo:text-align="center" style:justify-single-word="false"/>
      <style:text-properties officeooo:rsid="0020edcf" officeooo:paragraph-rsid="00218bc6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218bc6"/>
    </style:style>
    <style:style style:name="P52" style:family="paragraph" style:parent-style-name="Heading_20_2">
      <style:paragraph-properties fo:break-before="page"/>
      <style:text-properties officeooo:paragraph-rsid="002472c9"/>
    </style:style>
    <style:style style:name="P53" style:family="paragraph" style:parent-style-name="Text_20_body">
      <style:text-properties officeooo:paragraph-rsid="002472c9"/>
    </style:style>
    <style:style style:name="P54" style:family="paragraph" style:parent-style-name="Text_20_body" style:list-style-name="L2">
      <style:text-properties officeooo:paragraph-rsid="002472c9"/>
    </style:style>
    <style:style style:name="P55" style:family="paragraph" style:parent-style-name="Text_20_body">
      <style:paragraph-properties style:writing-mode="lr-tb"/>
      <style:text-properties officeooo:rsid="000cc172" officeooo:paragraph-rsid="000cc172"/>
    </style:style>
    <style:style style:name="P56" style:family="paragraph" style:parent-style-name="Text_20_body">
      <style:paragraph-properties fo:margin-left="0cm" fo:text-align="start" style:justify-single-word="false" fo:text-indent="1.251cm" style:auto-text-indent="false" style:writing-mode="lr-tb"/>
    </style:style>
    <style:style style:name="P57" style:family="paragraph" style:parent-style-name="Text_20_body">
      <style:paragraph-properties style:writing-mode="lr-tb"/>
      <style:text-properties officeooo:paragraph-rsid="000e8e9f"/>
    </style:style>
    <style:style style:name="P58" style:family="paragraph" style:parent-style-name="Text_20_body">
      <style:paragraph-properties style:writing-mode="lr-tb"/>
      <style:text-properties officeooo:rsid="000e8e9f" officeooo:paragraph-rsid="000e8e9f"/>
    </style:style>
    <style:style style:name="P59" style:family="paragraph" style:parent-style-name="Heading_20_2" style:list-style-name="">
      <style:paragraph-properties fo:margin-left="0cm" fo:text-align="star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Heading_20_2" style:list-style-name="WWNum1">
      <style:paragraph-properties fo:margin-left="0cm" fo:text-align="start" style:justify-single-word="false" fo:text-indent="1.251cm" style:auto-text-indent="false" fo:break-before="page" style:writing-mode="lr-tb"/>
    </style:style>
    <style:style style:name="P61" style:family="paragraph" style:parent-style-name="Text_20_body">
      <style:paragraph-properties style:writing-mode="lr-tb"/>
      <style:text-properties officeooo:paragraph-rsid="000ec0f8"/>
    </style:style>
    <style:style style:name="P62" style:family="paragraph" style:parent-style-name="Text_20_body">
      <style:paragraph-properties fo:margin-left="0cm" fo:text-indent="0cm" style:auto-text-indent="false" style:writing-mode="lr-tb"/>
      <style:text-properties officeooo:rsid="0015b670" officeooo:paragraph-rsid="0015b670"/>
    </style:style>
    <style:style style:name="P63" style:family="paragraph" style:parent-style-name="Text_20_body">
      <style:paragraph-properties fo:margin-top="0cm" fo:margin-bottom="0.247cm" style:contextual-spacing="false" style:writing-mode="lr-tb"/>
    </style:style>
    <style:style style:name="P64" style:family="paragraph" style:parent-style-name="Heading_20_1">
      <style:paragraph-properties fo:break-before="page"/>
      <style:text-properties officeooo:rsid="0018eb18" officeooo:paragraph-rsid="0018eb18"/>
    </style:style>
    <style:style style:name="P65" style:family="paragraph" style:parent-style-name="Text_20_body">
      <style:text-properties officeooo:paragraph-rsid="0018eb18"/>
    </style:style>
    <style:style style:name="P66" style:family="paragraph" style:parent-style-name="Text_20_body">
      <style:text-properties officeooo:rsid="0018eb18" officeooo:paragraph-rsid="0018eb18"/>
    </style:style>
    <style:style style:name="P67" style:family="paragraph" style:parent-style-name="Heading_20_1">
      <style:paragraph-properties fo:break-before="page"/>
      <style:text-properties officeooo:rsid="0015e9f3" officeooo:paragraph-rsid="0015e9f3"/>
    </style:style>
    <style:style style:name="P68" style:family="paragraph" style:parent-style-name="Text_20_body">
      <style:text-properties officeooo:rsid="001662ca" officeooo:paragraph-rsid="0015e9f3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0" style:family="paragraph" style:parent-style-name="Text_20_body">
      <style:text-properties officeooo:rsid="003b1be5" officeooo:paragraph-rsid="003b1be5"/>
    </style:style>
    <style:style style:name="P71" style:family="paragraph" style:parent-style-name="Text_20_body" style:list-style-name="L3">
      <style:text-properties officeooo:paragraph-rsid="001662ca"/>
    </style:style>
    <style:style style:name="T1" style:family="text">
      <style:text-properties style:font-name="Times New Roman" fo:font-size="12pt" style:font-name-asian="Times New Roman1" style:font-size-asian="12pt" style:language-asian="zh" style:country-asian="CN" style:font-name-complex="Times New Roman1" style:font-size-complex="12pt"/>
    </style:style>
    <style:style style:name="T2" style:family="text">
      <style:text-properties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e11c5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ebbad" style:font-size-asian="14pt" style:font-name-complex="Times New Roman1" style:font-size-complex="14pt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officeooo:rsid="003352a0"/>
    </style:style>
    <style:style style:name="T10" style:family="text">
      <style:text-properties style:use-window-font-color="true" loext:opacity="0%" fo:language="ru" fo:country="RU" officeooo:rsid="003352a0" style:letter-kerning="true" style:font-name-asian="Noto Sans" style:language-asian="zh" style:country-asian="CN" style:font-name-complex="FreeSans1" style:font-size-complex="12pt" style:language-complex="hi" style:country-complex="IN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Impact" style:font-family-generic="swiss" style:font-pitch="variable" fo:font-size="10pt" fo:letter-spacing="normal" fo:language="ru" fo:country="RU" fo:font-style="normal" fo:text-shadow="none" style:text-underline-style="none" fo:font-weight="bold" style:letter-kerning="true" fo:background-color="transparent" style:font-name-asian="Noto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normal" officeooo:rsid="003352a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3352a0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T21" style:family="text">
      <style:text-properties fo:font-weight="normal" officeooo:rsid="001e7ed2" style:font-weight-asian="normal" style:font-weight-complex="normal"/>
    </style:style>
    <style:style style:name="T22" style:family="text">
      <style:text-properties officeooo:rsid="001e7ed2"/>
    </style:style>
    <style:style style:name="T23" style:family="text">
      <style:text-properties officeooo:rsid="001ed149"/>
    </style:style>
    <style:style style:name="T24" style:family="text">
      <style:text-properties fo:font-weight="normal" officeooo:rsid="001ed149" style:font-weight-asian="normal" style:font-weight-complex="normal"/>
    </style:style>
    <style:style style:name="T25" style:family="text">
      <style:text-properties officeooo:rsid="0020edcf"/>
    </style:style>
    <style:style style:name="T26" style:family="text">
      <style:text-properties fo:font-weight="normal" officeooo:rsid="0020edcf" style:font-weight-asian="normal" style:font-weight-complex="normal"/>
    </style:style>
    <style:style style:name="T27" style:family="text">
      <style:text-properties officeooo:rsid="00218bc6"/>
    </style:style>
    <style:style style:name="T28" style:family="text">
      <style:text-properties officeooo:rsid="002472c9"/>
    </style:style>
    <style:style style:name="T29" style:family="text">
      <style:text-properties fo:font-weight="normal" officeooo:rsid="00258678" style:font-weight-asian="normal" style:font-weight-complex="normal"/>
    </style:style>
    <style:style style:name="T30" style:family="text">
      <style:text-properties officeooo:rsid="000e8e9f"/>
    </style:style>
    <style:style style:name="T31" style:family="text">
      <style:text-properties officeooo:rsid="000b8767"/>
    </style:style>
    <style:style style:name="T32" style:family="text">
      <style:text-properties officeooo:rsid="000ec0f8" fo:background-color="transparent" loext:char-shading-value="0"/>
    </style:style>
    <style:style style:name="T33" style:family="text">
      <style:text-properties officeooo:rsid="003352a0" fo:background-color="transparent" loext:char-shading-value="0"/>
    </style:style>
    <style:style style:name="T34" style:family="text">
      <style:text-properties officeooo:rsid="000ec0f8"/>
    </style:style>
    <style:style style:name="T35" style:family="text">
      <style:text-properties officeooo:rsid="00114999"/>
    </style:style>
    <style:style style:name="T36" style:family="text">
      <style:text-properties officeooo:rsid="00132440"/>
    </style:style>
    <style:style style:name="T37" style:family="text">
      <style:text-properties officeooo:rsid="0015b670"/>
    </style:style>
    <style:style style:name="T38" style:family="text">
      <style:text-properties officeooo:rsid="00147be0"/>
    </style:style>
    <style:style style:name="T39" style:family="text">
      <style:text-properties officeooo:rsid="0015e9f3"/>
    </style:style>
    <style:style style:name="T40" style:family="text">
      <style:text-properties officeooo:rsid="00181f7c"/>
    </style:style>
    <style:style style:name="T41" style:family="text">
      <style:text-properties officeooo:rsid="002815da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2cm" draw:visible-area-height="5.002cm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 loext:marker-style-name="T1"><draw:frame draw:style-name="fr1" draw:name="Объект1" text:anchor-type="as-char" svg:width="3.096cm" svg:height="3.598cm" draw:z-index="10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p>
          </table:table-cell>
          <table:table-cell table:style-name="Таблица2.A1" office:value-type="string">
            <text:p text:style-name="P2" loext:marker-style-name="T2"><text:span text:style-name="T2">ГБПОУ</text:span></text:p>
            <text:p text:style-name="P2" loext:marker-style-name="T2"><text:span text:style-name="T2">«ПЕРМСКИЙ РАДИОТЕХНИЧЕСКИЙ </text:span></text:p>
            <text:p text:style-name="P2" loext:marker-style-name="T2"><text:span text:style-name="T2">КОЛЛЕДЖ ИМ.А.С. ПОПОВА»</text:span></text:p>
          </table:table-cell>
        </table:table-row>
      </table:table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p text:style-name="P4">КУРСОВАЯ РАБОТА</text:p>
      <text:p text:style-name="P4"/>
      <text:p text:style-name="P5"><text:bookmark-start text:name="__RefHeading___Toc9078_1321148769"/>на тему: «Разработка локальног LLM сервера и внедрение AI-агента в рабочую среду»<text:bookmark-end text:name="__RefHeading___Toc9078_1321148769"/></text:p>
      <text:h text:style-name="P6" text:outline-level="1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 loext:marker-style-name="T4"/>
          </table:table-cell>
          <table:table-cell table:style-name="Таблица3.A1" office:value-type="string">
            <text:p text:style-name="P8" loext:marker-style-name="T5"><text:span text:style-name="T5">Выполнил: </text:span></text:p>
            <text:p text:style-name="P8" loext:marker-style-name="T5"><text:span text:style-name="T6">Беловодский </text:span><text:span text:style-name="T7">П. В.</text:span><text:span text:style-name="T5">,</text:span></text:p>
            <text:p text:style-name="P8" loext:marker-style-name="T5"><text:span text:style-name="T5">студент </text:span><text:span text:style-name="T7">гр. ССА-25-20</text:span></text:p>
            <text:p text:style-name="P9" loext:marker-style-name="T5"/>
            <text:p text:style-name="P8" loext:marker-style-name="T5"><text:span text:style-name="T5">Руководитель работы:</text:span></text:p>
            <text:p text:style-name="P10" loext:marker-style-name="T5"><text:span text:style-name="T5">Тимохов А.А.</text:span></text:p>
            <text:p text:style-name="P7" loext:marker-style-name="T4"/>
          </table:table-cell>
        </table:table-row>
      </table:table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p text:style-name="P12">Пермь 2026</text:p>
      <text:h text:style-name="P13" text:outline-level="3"><text:bookmark-start text:name="__RefHeading___Toc104_3548392200_Копия_1"/>Содержание<text:bookmark-end text:name="__RefHeading___Toc104_3548392200_Копия_1"/></text:h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3200_3548392200" office:name="Термины и определения" text:style-name="Index_20_Link" text:visited-style-name="Index_20_Link">Термины и определения<text:tab/>2</text:a></text:p>
          <text:p text:style-name="P14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6</text:a></text:p>
          <text:p text:style-name="P14"><text:a xlink:type="simple" xlink:href="#__RefHeading___Toc4210_3548392200" office:name="Введение" text:style-name="Index_20_Link" text:visited-style-name="Index_20_Link">Введение<text:tab/>8</text:a></text:p>
          <text:p text:style-name="P14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11</text:a></text:p>
          <text:p text:style-name="P14"><text:a xlink:type="simple" xlink:href="#__RefHeading___Toc868_2141837623" office:name="1.1 Ollama" text:style-name="Index_20_Link" text:visited-style-name="Index_20_Link">1.1 Ollama<text:tab/>11</text:a></text:p>
          <text:p text:style-name="P14"><text:a xlink:type="simple" xlink:href="#__RefHeading___Toc735_118244425" office:name="1.2 Llama.cpp" text:style-name="Index_20_Link" text:visited-style-name="Index_20_Link">1.2 Llama.cpp<text:tab/>12</text:a></text:p>
          <text:p text:style-name="P14"><text:a xlink:type="simple" xlink:href="#__RefHeading___Toc630_3774095318" office:name="1.3 Вывод анализа" text:style-name="Index_20_Link" text:visited-style-name="Index_20_Link">1.3 Вывод анализа<text:tab/>13</text:a></text:p>
          <text:p text:style-name="P14"><text:a xlink:type="simple" xlink:href="#__RefHeading___Toc632_3774095318" office:name="2 Определение аппаратных требований к серверной платформе" text:style-name="Index_20_Link" text:visited-style-name="Index_20_Link">2 Определение аппаратных требований к серверной платформе<text:tab/>14</text:a></text:p>
          <text:p text:style-name="P14"><text:a xlink:type="simple" xlink:href="#__RefHeading___Toc1721_1378716561" office:name="2.1 Факторы, определяющие аппаратные требования" text:style-name="Index_20_Link" text:visited-style-name="Index_20_Link">2.1 Факторы, определяющие аппаратные требования<text:tab/>14</text:a></text:p>
          <text:p text:style-name="P14"><text:a xlink:type="simple" xlink:href="#__RefHeading___Toc6263_1378716561" office:name="2.2 Требования к ОЗУ" text:style-name="Index_20_Link" text:visited-style-name="Index_20_Link">2.2 Требования к ОЗУ<text:tab/>15</text:a></text:p>
          <text:p text:style-name="P14"><text:a xlink:type="simple" xlink:href="#__RefHeading___Toc6265_1378716561" office:name="2.3 Требования к CPU и GPU" text:style-name="Index_20_Link" text:visited-style-name="Index_20_Link">2.3 Требования к CPU и GPU<text:tab/>16</text:a></text:p>
          <text:p text:style-name="P14"><text:a xlink:type="simple" xlink:href="#__RefHeading___Toc6267_1378716561" office:name="2.4 Требования к дисковому пространству" text:style-name="Index_20_Link" text:visited-style-name="Index_20_Link">2.4 Требования к дисковому пространству<text:tab/>16</text:a></text:p>
          <text:p text:style-name="P14"><text:a xlink:type="simple" xlink:href="#__RefHeading___Toc6269_1378716561" office:name="2.5 Сетевые требования" text:style-name="Index_20_Link" text:visited-style-name="Index_20_Link">2.5 Сетевые требования<text:tab/>17</text:a></text:p>
          <text:p text:style-name="P14"><text:a xlink:type="simple" xlink:href="#__RefHeading___Toc6271_1378716561" office:name="2.6 Итоговые минимальные требования для реальной эксплуатации" text:style-name="Index_20_Link" text:visited-style-name="Index_20_Link">2.6 Итоговые минимальные требования для реальной эксплуатации<text:tab/>17</text:a></text:p>
          <text:p text:style-name="P14"><text:a xlink:type="simple" xlink:href="#__RefHeading___Toc6273_1378716561" office:name="2.7 Конфигурация для курсовой работы" text:style-name="Index_20_Link" text:visited-style-name="Index_20_Link">2.7 Конфигурация для курсовой работы<text:tab/>18</text:a></text:p>
          <text:p text:style-name="P14"><text:a xlink:type="simple" xlink:href="#__RefHeading___Toc4607_3774095318" office:name="3 РАЗРАБОТКА КОНФИГУРАЦИИ СЕРВЕРА" text:style-name="Index_20_Link" text:visited-style-name="Index_20_Link">3 РАЗРАБОТКА КОНФИГУРАЦИИ СЕРВЕРА<text:tab/>19</text:a></text:p>
          <text:p text:style-name="P14"><text:a xlink:type="simple" xlink:href="#__RefHeading___Toc4609_3774095318" office:name="3.1 Подготовка програмного окружения" text:style-name="Index_20_Link" text:visited-style-name="Index_20_Link">3.1 Подготовка програмного окружения<text:tab/>19</text:a></text:p>
          <text:p text:style-name="P14"><text:a xlink:type="simple" xlink:href="#__RefHeading___Toc4611_3774095318" office:name="3.2 Скрипт запуска сервера" text:style-name="Index_20_Link" text:visited-style-name="Index_20_Link">3.2 Скрипт запуска сервера<text:tab/>19</text:a></text:p>
          <text:p text:style-name="P14"><text:a xlink:type="simple" xlink:href="#__RefHeading___Toc4613_3774095318" office:name="3.3 Работа модели" text:style-name="Index_20_Link" text:visited-style-name="Index_20_Link">3.3 Работа модели<text:tab/>21</text:a></text:p>
          <text:p text:style-name="P14"><text:a xlink:type="simple" xlink:href="#__RefHeading___Toc6072_3774095318" office:name="4 РЕАЛИЗАЦИЯ ИНТЕГРАЦИИ ЛОКАЛЬНОГО LLM-СЕРВЕРА СО СРЕДОЙ РАЗРАБОТКИ CODE OSS" text:style-name="Index_20_Link" text:visited-style-name="Index_20_Link">4 РЕАЛИЗАЦИЯ ИНТЕГРАЦИИ ЛОКАЛЬНОГО LLM-СЕРВЕРА СО СРЕДОЙ РАЗРАБОТКИ CODE OSS<text:tab/>22</text:a></text:p>
          <text:p text:style-name="P14"><text:a xlink:type="simple" xlink:href="#__RefHeading___Toc6074_3774095318" office:name="4.1 Выбор инструмента интеграции: расширение Continue" text:style-name="Index_20_Link" text:visited-style-name="Index_20_Link">4.1 Выбор инструмента интеграции: расширение Continue<text:tab/>22</text:a></text:p>
          <text:p text:style-name="P14"><text:a xlink:type="simple" xlink:href="#__RefHeading___Toc6078_3774095318" office:name="4.2 Проверка работоспособности интеграции" text:style-name="Index_20_Link" text:visited-style-name="Index_20_Link">4.2 Проверка работоспособности интеграции<text:tab/>23</text:a></text:p>
          <text:p text:style-name="P14"><text:a xlink:type="simple" xlink:href="#__RefHeading___Toc775_3015941620" office:name="4.3 Выводы по интеграции" text:style-name="Index_20_Link" text:visited-style-name="Index_20_Link">4.3 Выводы по интеграции<text:tab/>25</text:a></text:p>
          <text:p text:style-name="P14"><text:a xlink:type="simple" xlink:href="#__RefHeading___Toc1723_1378716561" office:name="Заключение" text:style-name="Index_20_Link" text:visited-style-name="Index_20_Link">Заключение<text:tab/>26</text:a></text:p>
          <text:p text:style-name="P14"><text:a xlink:type="simple" xlink:href="#__RefHeading___Toc6349_3015941620" office:name="Список использованных источников" text:style-name="Index_20_Link" text:visited-style-name="Index_20_Link">Список использованных источников<text:tab/>27</text:a></text:p>
        </text:index-body>
      </text:table-of-content>
      <text:p text:style-name="P15" loext:marker-style-name="T3"/>
      <text:list text:style-name="WWNum1">
        <text:list-item>
          <text:h text:style-name="P16" text:outline-level="1"><text:bookmark-start text:name="__RefHeading___Toc3200_3548392200"/>Термины и определения<text:bookmark-end text:name="__RefHeading___Toc3200_3548392200"/></text:h>
        </text:list-item>
      </text:list>
      <text:p text:style-name="P17"/>
      <text:p text:style-name="P17"><text:soft-page-break/>В настоящей курсовой работе применяют следующие термины с соответствующими определениями:</text:p>
      <text:p text:style-name="P18">API (Application Programming Interface) — программный интерфейс, то есть описание способов взаимодействия одной компьютерной программы с другими</text:p>
      <text:p text:style-name="P18">AI — также ИИ, искусственный разум, в самом широком смысле — научно-технологическая область, занимающаяся изучением и созданием интеллектуальных сущностей</text:p>
      <text:p text:style-name="P18">LLM (large language model) — <text:span text:style-name="T8">Большая языковая модель основанная на</text:span><text:bookmark text:name="mwCg"/><text:span text:style-name="T8"> нейроной сети 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8"> текста методами самообучения</text:span></text:p>
      <text:p text:style-name="P19">Квантование (Quantization) — процесс уменьшения точности числовых представлений весов модели (например, с 16 бит до 4 бит) с целью сокращения потребления памяти и ускорения вычислений при незначительной потере качества</text:p>
      <text:p text:style-name="P17" loext:marker-style-name="T8">GGUF (GPT-Generated Unified Format) — формат файлов для хранения квантованных моделей машинного обучения, разработанный для проекта llama.cpp. Является эволюционным развитием формата GGML, обеспечивает лучшую совместимость, расширяемость и поддержку метаданных</text:p>
      <text:p text:style-name="P17" loext:marker-style-name="T8">KV-кэш (Key-Value Cache) — структура данных, хранящая ключи и значения промежуточных вычислений внимания (attention) при генерации текста. Позволяет избежать повторных вычислений для уже обработанных токенов, значительно ускоряя инференс, но требует дополнительной памяти</text:p>
      <text:p text:style-name="P17" loext:marker-style-name="T8">Контекстное окно (Context Window) — максимальное количество токенов (слов или их частей), которые модель может учитывать при генерации <text:soft-page-break/>ответа. Чем больше контекстное окно, тем более длинные и связные диалоги может вести модель, но тем больше требуется оперативной памяти</text:p>
      <text:p text:style-name="P17" loext:marker-style-name="T8">Параллельная сессия (Parallel Session) — одновременный сеанс работы пользователя с моделью, при котором запросы обрабатываются независимо друг от друга. Каждая сессия требует выделения собственного KV-кэша и вычислительных ресурсов</text:p>
      <text:p text:style-name="P17" loext:marker-style-name="T8">Серверная платформа (Server Platform) — совокупность аппаратного и программного обеспечения, на которой развёрнут LLM-сервер, включая процессор, оперативную память, видеокарту, дисковую подсистему и операционную систему</text:p>
      <text:p text:style-name="P17" loext:marker-style-name="T8">Code OSS — полностью открытая версия редактора Visual Studio Code, распространяемая под лицензией MIT. Не содержит телеметрии и проприетарных компонентов Microsoft, что делает её предпочтительным выбором для организаций с высокими требованиями к безопасности и открытости ПО</text:p>
      <text:p text:style-name="P17" loext:marker-style-name="T8">Continue — открытое расширение (плагин) для Visual Studio Code и Code OSS, предоставляющее AI-ассистента для разработчиков. Поддерживает подключение к различным моделям, включая локальные, через совместимый API</text:p>
      <text:p text:style-name="P17" loext:marker-style-name="T8">CPU Affinity — механизм привязки вычислительных процессов или потоков к конкретным ядрам процессора. Позволяет повысить производительность за счёт сокращения задержек при переключении контекста и более эффективного использования кэш-памяти</text:p>
      <text:p text:style-name="P17" loext:marker-style-name="T8">NUMA (Non-Uniform Memory Access) — архитектура компьютерной памяти, используемая в многопроцессорных системах, при которой время доступа к памяти зависит от её расположения относительно процессора. <text:soft-page-break/>Требует специальной оптимизации для достижения максимальной производительности</text:p>
      <text:p text:style-name="P17" loext:marker-style-name="T8">Fine-tuning (тонкая настройка) — процесс дополнительного обучения предварительно обученной модели на специализированном наборе данных для адаптации к конкретной задаче или предметной области</text:p>
      <text:p text:style-name="P17" loext:marker-style-name="T8">Open-Source (открытое программное обеспечение) — программное обеспечение с открытым исходным кодом, которое можно свободно использовать, изменять и распространять в соответствии с условиями лицензии</text:p>
      <text:list text:continue-numbering="true" text:style-name="WWNum1">
        <text:list-item>
          <text:h text:style-name="P20" text:outline-level="1"><text:bookmark-start text:name="__RefHeading___Toc104_3548392200"/>Перечень сокращений и обозначений<text:bookmark-end text:name="__RefHeading___Toc104_3548392200"/></text:h>
        </text:list-item>
      </text:list>
      <text:p text:style-name="P17"/>
      <text:p text:style-name="P17">В настоящей курсовой работе применяют следующие сокращения и обозначения:</text:p>
      <text:p text:style-name="P21">AI — Artificial Intelligence (искусственный интеллект)</text:p>
      <text:p text:style-name="P21">API — Application Programming Interface (программный интерфейс приложения)</text:p>
      <text:p text:style-name="P21">CPU — Central Processing Unit (центральный процессор)</text:p>
      <text:p text:style-name="P21">GGUF — GPT-Generated Unified Format (формат файлов моделей, пришедший на смену GGML)</text:p>
      <text:p text:style-name="P21">GPU — Graphics Processing Unit (графический процессор)</text:p>
      <text:p text:style-name="P21">HTTP<text:tab/> — HyperText Transfer Protocol (протокол передачи гипертекста)</text:p>
      <text:p text:style-name="P21">IDE — Integrated Development Environment (интегрированная среда разработки)</text:p>
      <text:p text:style-name="P21">IT — Information Technology (информационные технологии)</text:p>
      <text:p text:style-name="P21">JSON — JavaScript Object Notation (текстовый формат обмена данными)</text:p>
      <text:p text:style-name="P21">KV-кэш — Key-Value cache (кэш ключей и значений, используемый при генерации текста)</text:p>
      <text:p text:style-name="P21">LDAP — Lightweight Directory Access Protocol (протокол доступа к каталогам)</text:p>
      <text:p text:style-name="P21">LLM — Large Language Model (большая языковая модель)</text:p>
      <text:p text:style-name="P21">MIT — Massachusetts Institute of Technology (лицензия свободного программного обеспечения)</text:p>
      <text:p text:style-name="P21">NUMA — Non-Uniform Memory Access (неоднородный доступ к памяти)</text:p>
      <text:p text:style-name="P21"><text:soft-page-break/>ОЗУ — Оперативное запоминающее устройство (оперативная память)</text:p>
      <text:p text:style-name="P21">ОС — Операционная система</text:p>
      <text:p text:style-name="P21">ПО — Программное обеспечение</text:p>
      <text:p text:style-name="P21">RAG — Retrieval-Augmented Generation (генерация с дополненным поиском)</text:p>
      <text:p text:style-name="P21">RAM — Random Access Memory (оперативная память с произвольным доступом)</text:p>
      <text:p text:style-name="P21">VRAM — Video RAM (видеопамять)</text:p>
      <text:p text:style-name="P21">YAML — YAML Ain't Markup Language (формат сериализации данных, ориентированный на удобство чтения человеком)</text:p>
      <text:list xml:id="list213435570163367" text:continue-numbering="true" text:style-name="WWNum1">
        <text:list-item>
          <text:h text:style-name="P20" text:outline-level="1"><text:bookmark-start text:name="__RefHeading___Toc4210_3548392200"/>Введение<text:bookmark-end text:name="__RefHeading___Toc4210_3548392200"/></text:h>
        </text:list-item>
      </text:list>
      <text:p text:style-name="P17">Современные IT-компании активно внедряют инструменты искусственного интеллекта в процессы разработки. Согласно исследованию Stack Overflow 2025 года, 84% разработчиков используют или планируют использовать AI-инструменты, при этом 51% применяют их ежедневно [<text:bookmark-ref text:reference-format="number" text:ref-name="__RefNumPara__12930_1321148769">1</text:bookmark-ref>]. Исследование Complexity Science Hub показывает, что доля AI-ассистированного кода на GitHub выросла с 5% в 2022 году до 29% к концу 2024 года [<text:bookmark-ref text:reference-format="number" text:ref-name="__RefNumPara__13142_1321148769">2</text:bookmark-ref>].</text:p>
      <text:p text:style-name="Text_20_body">Однако рост популярности облачных AI-решений (GitHub Copilot, ChatGPT) обостряет проблему безопасности интеллектуальной собственности <text:span text:style-name="T9">[</text:span><text:span text:style-name="T10"><text:bookmark-ref text:reference-format="number" text:ref-name="__RefNumPara__13142_1321148769">2</text:bookmark-ref></text:span><text:span text:style-name="T9">]</text:span>. Передача фрагментов кодовой базы сторонним серверам создаёт риски утечки конфиденциальных алгоритмов и коммерческой тайны. Эксперты отмечают, 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P18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22">Существует ряд open-source инструментов для локального запуска моделей, таких как Ollama <text:span text:style-name="T9">[</text:span><text:span text:style-name="T9"><text:bookmark-ref text:reference-format="number" text:ref-name="__RefNumPara__13144_1321148769">4</text:bookmark-ref></text:span><text:span text:style-name="T9">]</text:span> и llama.cpp <text:span text:style-name="T9">[</text:span><text:span text:style-name="T9"><text:bookmark-ref text:reference-format="number" text:ref-name="__RefNumPara__13146_1321148769">3</text:bookmark-ref></text:span><text:span text:style-name="T9">]</text:span>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17"><text:soft-page-break/>Объект исследования — процесс организации безопасной локальной инфраструктуры для использования LLM в разработке ПО.</text:p>
      <text:p text:style-name="P17">Предмет исследования — методы развёртывания, администрирования и интеграции локального LLM-сервера в рабочую среду IT-специалистов, в частности подключение к среде разработки Code OSS</text:p>
      <text:p text:style-name="P18"><text:span text:style-name="Strong_20_Emphasis"><text:span text:style-name="T11">Цель работы — разработать и экспериментально подтвердить работоспособность локального LLM-сервера, обеспечить его администрирование в условиях локальной сети и выполнить интеграцию со средой разработки Code OSS.</text:span></text:span></text:p>
      <text:p text:style-name="P18"><text:span text:style-name="Strong_20_Emphasis"><text:span text:style-name="T11">Задачи:</text:span></text:span><office:annotation loext:resolved="false"><dc:creator>&lt;анонимный&gt;</dc:creator><dc:date>2026-06-05T22:00:06</dc:date><text:p text:style-name="P23"><text:span text:style-name="T12">Куда то добавить мою конфигурацию</text:span></text:p></office:annotation></text:p>
      <text:list text:style-name="WWNum3">
        <text:list-item>
          <text:p text:style-name="P24">Провести анализ существующих решений для локального развёртывания LLM и обосновать выбор инструмента для реализации сервера.</text:p>
        </text:list-item>
        <text:list-item>
          <text:p text:style-name="P24" loext:marker-style-name="T13"><text:span text:style-name="T13">Определить аппаратные требования к серверной платформе для многопользовательского сценария.</text:span></text:p>
        </text:list-item>
        <text:list-item>
          <text:p text:style-name="P24" loext:marker-style-name="T13"><text:bookmark-start text:name="__RefNumPara__13148_1321148769"/><text:span text:style-name="T13">Разработать конфигурацию сервера, обеспечивающую стабильную работу, и выполнить установку и настройку программного обеспечения.</text:span><text:bookmark-end text:name="__RefNumPara__13148_1321148769"/></text:p>
        </text:list-item>
        <text:list-item>
          <text:p text:style-name="P24"><text:span text:style-name="T13">Реализовать интеграцию локального LLM-сервера с Code OSS на</text:span> клиентском компьютере.</text:p>
        </text:list-item>
        <text:list-item>
          <text:p text:style-name="P24">Выполнить экспериментальную проверку работоспособности решения .</text:p>
        </text:list-item>
        <text:list-item>
          <text:p text:style-name="P24" loext:marker-style-name="T13"><text:span text:style-name="T13">Сформулировать рекомендации по администрированию сервера .</text:span><office:annotation loext:resolved="false"><dc:creator>&lt;анонимный&gt;</dc:creator><dc:date>2026-06-06T02:31:37</dc:date><text:p text:style-name="P23"><text:span text:style-name="T12">Сделать краткое содержание </text:span></text:p></office:annotation></text:p>
        </text:list-item>
      </text:list>
      <text:p text:style-name="P17" loext:marker-style-name="T13">Дипломный проект состоит из введения, четырёх глав, заключения и списка использованных источников.</text:p>
      <text:p text:style-name="P17" loext:marker-style-name="T13">В первой главе проводится анализ существующих решений для локального развёртывания LLM (Ollama и llama.cpp), сравниваются их <text:soft-page-break/>архитектурные особенности и обосновывается выбор инструмента для реализации серверной части.</text:p>
      <text:p text:style-name="P17" loext:marker-style-name="T13">Во второй главе определяются аппаратные требования к серверной платформе, рассчитывается потребление оперативной памяти, рассматриваются требования к CPU, GPU, дисковому пространству и сети, а также приводятся минимальные и рекомендуемые конфигурации.</text:p>
      <text:p text:style-name="P17" loext:marker-style-name="T13">В третьей главе описывается практическая разработка конфигурации сервера: подготовка программного окружения, компиляция llama.cpp, создание скрипта запуска и тестирование работоспособности модели.</text:p>
      <text:p text:style-name="P17" loext:marker-style-name="T13">В четвёртой главе рассматривается реализация интеграции локального LLM-сервера со средой разработки Code OSS через расширение Continue, описывается настройка конфигурационного файла, проверка работоспособности и анализ результатов.</text:p>
      <text:p text:style-name="P17" loext:marker-style-name="T13">В заключении подводятся итоги работы, формулируются выводы и рекомендации по дальнейшему развитию проекта.</text:p>
      <text:h text:style-name="P25" text:outline-level="1"><text:span text:style-name="Strong_20_Emphasis"><text:span text:style-name="T14"/></text:span></text:h>
      <text:list text:continue-list="list213435570163367" text:style-name="WWNum1">
        <text:list-item>
          <text:h text:style-name="P26" text:outline-level="1"><text:bookmark-start text:name="__RefHeading___Toc866_2141837623"/><text:span text:style-name="Strong_20_Emphasis"><text:span text:style-name="T14">1 Анализ решений для локального развёртывания LLM и обоснование выбора llama.cpp</text:span></text:span><text:bookmark-end text:name="__RefHeading___Toc866_2141837623"/></text:h>
        </text:list-item>
      </text:list>
      <text:p text:style-name="P18"><text:span text:style-name="Strong_20_Emphasis"/></text:p>
      <text:p text:style-name="P18"><text:span text:style-name="Strong_20_Emphasis"><text:span text:style-name="T11">Для организации локального LLM-сервера, доступного нескольким пользователям в корпоративной сети, наиболее актуальными являются два решения: Ollama и llama.cpp (с компонентом llama-server ). Оба инструмента базируются на ед</text:span></text:span><text:span text:style-name="Strong_20_Emphasis"><text:span text:style-name="T15">иной технологической основе (формат GGUF, оптимизации CPU/GPU), но принципиально различаются по архитектуре и подходу к администрированию.</text:span></text:span></text:p>
      <text:p text:style-name="P27" loext:marker-style-name="T15"><text:span text:style-name="Strong_20_Emphasis"><text:span text:style-name="T15"/></text:span></text:p>
      <text:list xml:id="list213436796733426" text:continue-numbering="true" text:style-name="WWNum1">
        <text:list-item>
          <text:list>
            <text:list-item>
              <text:h text:style-name="P28" text:outline-level="2"><text:bookmark-start text:name="__RefHeading___Toc868_2141837623"/><text:span text:style-name="Strong_20_Emphasis"><text:span text:style-name="T16">1.1 Ollama</text:span></text:span><text:bookmark-end text:name="__RefHeading___Toc868_2141837623"/></text:h>
            </text:list-item>
          </text:list>
        </text:list-item>
      </text:list>
      <text:p text:style-name="P17"><text:span text:style-name="Strong_20_Emphasis"/></text:p>
      <text:p text:style-name="P18"><text:span text:style-name="Strong_20_Emphasis"><text:span text:style-name="T11">Ollama</text:span></text:span><text:span text:style-name="Strong_20_Emphasis"><text:span text:style-name="T15"> позиционируется как «LLM-движок для разработчиков» </text:span></text:span><text:span text:style-name="Strong_20_Emphasis"><text:span text:style-name="T17">[</text:span></text:span><text:span text:style-name="Strong_20_Emphasis"><text:span text:style-name="T17"><text:bookmark-ref text:reference-format="number" text:ref-name="__RefNumPara__13144_1321148769">4</text:bookmark-ref></text:span></text:span><text:span text:style-name="Strong_20_Emphasis"><text:span text:style-name="T17">]</text:span></text:span><text:span text:style-name="Strong_20_Emphasis"><text:span text:style-name="T15">, предлагая максимально простой путь запуска моделей. Однако при использовании в многопользовательском сценарии проявляются его некоторые недостатки</text:span></text:span></text:p>
      <text:p text:style-name="P17"><text:span text:style-name="Strong_20_Emphasis"><text:span text:style-name="T15">Достоинства:</text:span></text:span></text:p>
      <text:list text:style-name="WWNum4">
        <text:list-item>
          <text:list>
            <text:list-item>
              <text:p text:style-name="P29"><text:span text:style-name="Strong_20_Emphasis"><text:span text:style-name="T11">Установка одной командой, готовые пакеты для всех ОС</text:span></text:span></text:p>
            </text:list-item>
            <text:list-item>
              <text:p text:style-name="P29"><text:span text:style-name="Strong_20_Emphasis"><text:span text:style-name="T11">Встроенный реестр моделей</text:span></text:span></text:p>
            </text:list-item>
            <text:list-item>
              <text:p text:style-name="P29"><text:span text:style-name="Strong_20_Emphasis"><text:span text:style-name="T11">Open-AI совместимый API</text:span></text:span></text:p>
            </text:list-item>
          </text:list>
        </text:list-item>
      </text:list>
      <text:p text:style-name="P17"><text:span text:style-name="Strong_20_Emphasis"><text:span text:style-name="T11">Недостатки:</text:span></text:span></text:p>
      <text:list text:style-name="WWNum5">
        <text:list-item>
          <text:list>
            <text:list-item>
              <text:p text:style-name="P30"><text:span text:style-name="Strong_20_Emphasis"><text:span text:style-name="T11">Последовательная обработка запросов — при одновременных обращениях нескольких пользователей запросы ствят в очередь </text:span></text:span></text:p>
            </text:list-item>
            <text:list-item>
              <text:p text:style-name="P30"><text:span text:style-name="Strong_20_Emphasis"><text:span text:style-name="T11">Ограниченный контроль над реурсами — администратор не может распределить потоки CPU между задачами </text:span></text:span></text:p>
            </text:list-item>
            <text:list-item>
              <text:p text:style-name="P30"><text:span text:style-name="Strong_20_Emphasis"><text:span text:style-name="T11">Отсутсвие встроенного веб-интерфейса </text:span></text:span></text:p>
            </text:list-item>
            <text:list-item>
              <text:p text:style-name="P30"><text:soft-page-break/><text:span text:style-name="Strong_20_Emphasis"><text:span text:style-name="T11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31" loext:marker-style-name="T11"><text:span text:style-name="Strong_20_Emphasis"><text:span text:style-name="T11"/></text:span></text:p>
      <text:list xml:id="list213436521539353" text:continue-list="list213436796733426" text:style-name="WWNum1">
        <text:list-item>
          <text:list>
            <text:list-item>
              <text:h text:style-name="P28" text:outline-level="2"><text:bookmark-start text:name="__RefHeading___Toc735_118244425"/><text:span text:style-name="Strong_20_Emphasis"><text:span text:style-name="T14">1.2 Llama.cpp</text:span></text:span><text:bookmark-end text:name="__RefHeading___Toc735_118244425"/></text:h>
            </text:list-item>
          </text:list>
        </text:list-item>
      </text:list>
      <text:p text:style-name="P32" loext:marker-style-name="T11"><text:span text:style-name="Strong_20_Emphasis"><text:span text:style-name="T11"/></text:span></text:p>
      <text:p text:style-name="P18"><text:span text:style-name="Strong_20_Emphasis"><text:span text:style-name="T11">llama-server — это встроенный HTTP-сервер, входящий в состав проекта llama.cpp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46_1321148769">3</text:bookmark-ref></text:span></text:span><text:span text:style-name="Strong_20_Emphasis"><text:span text:style-name="T18">]</text:span></text:span><text:span text:style-name="Strong_20_Emphasis"><text:span text:style-name="T11">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организации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17"><text:span text:style-name="Strong_20_Emphasis"><text:span text:style-name="T11">Достоинства:</text:span></text:span></text:p>
      <text:list text:style-name="WWNum6">
        <text:list-item>
          <text:list>
            <text:list-item>
              <text:p text:style-name="P33"><text:span text:style-name="Strong_20_Emphasis"><text:span text:style-name="T11">Параллельная обработка сессий</text:span></text:span><text:span text:style-name="Strong_20_Emphasis"><text:span text:style-name="T19"> — </text:span></text:span><text:span text:style-name="Strong_20_Emphasis"><text:span text:style-name="T11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33"><text:span text:style-name="Strong_20_Emphasis"><text:span text:style-name="T11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33"><text:span text:style-name="Strong_20_Emphasis"><text:span text:style-name="T11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33"><text:span text:style-name="Strong_20_Emphasis"><text:span text:style-name="T11">Детальное логирование — все запросы и отеты логируются с возможностью нвстройки уровня детализации</text:span></text:span></text:p>
            </text:list-item>
            <text:list-item>
              <text:p text:style-name="P33"><text:span text:style-name="Strong_20_Emphasis"><text:span text:style-name="T11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34" loext:marker-style-name="T11"><text:span text:style-name="Strong_20_Emphasis"><text:span text:style-name="T11"/></text:span></text:p>
      <text:list text:continue-list="list213436521539353" text:style-name="WWNum1">
        <text:list-item>
          <text:list>
            <text:list-item>
              <text:h text:style-name="P35" text:outline-level="2"><text:bookmark-start text:name="__RefHeading___Toc630_3774095318"/><text:span text:style-name="Strong_20_Emphasis"><text:span text:style-name="T14">1.3 Вывод анализа </text:span></text:span><text:bookmark-end text:name="__RefHeading___Toc630_3774095318"/></text:h>
            </text:list-item>
          </text:list>
        </text:list-item>
      </text:list>
      <text:p text:style-name="P36"><text:span text:style-name="Strong_20_Emphasis"><text:span text:style-name="T14"/></text:span></text:p>
      <text:p text:style-name="P17"><text:span text:style-name="Strong_20_Emphasis"><text:span text:style-name="T11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17"><text:span text:style-name="Strong_20_Emphasis"><text:span text:style-name="T11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46_1321148769">3</text:bookmark-ref></text:span></text:span><text:span text:style-name="Strong_20_Emphasis"><text:span text:style-name="T18">]</text:span></text:span><text:span text:style-name="Strong_20_Emphasis"><text:span text:style-name="T11">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17"><text:span text:style-name="Strong_20_Emphasis"/></text:p>
      <text:h text:style-name="P25" text:outline-level="1"><text:span text:style-name="Strong_20_Emphasis"><text:span text:style-name="T14"/></text:span></text:h>
      <text:list text:continue-numbering="true" text:style-name="WWNum1">
        <text:list-item>
          <text:h text:style-name="P26" text:outline-level="1"><text:bookmark-start text:name="__RefHeading___Toc632_3774095318"/><text:span text:style-name="Strong_20_Emphasis"><text:span text:style-name="T14">2 Определение аппаратных требований к серверной платформе</text:span></text:span><text:bookmark-end text:name="__RefHeading___Toc632_3774095318"/></text:h>
        </text:list-item>
      </text:list>
      <text:p text:style-name="P37" loext:marker-style-name="T20"><text:span text:style-name="Strong_20_Emphasis"><text:span text:style-name="T20"/></text:span></text:p>
      <text:p text:style-name="P18"><text:span text:style-name="Strong_20_Emphasis"><text:span text:style-name="T11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1721_1378716561"/><text:span text:style-name="Strong_20_Emphasis">2.1 Факторы, определяющие аппаратные требования</text:span><text:bookmark-end text:name="__RefHeading___Toc1721_1378716561"/></text:h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11">Характеристики модели — </text:span></text:span><text:span text:style-name="Strong_20_Emphasis"><text:span text:style-name="T21">о</text:span></text:span><text:span text:style-name="Strong_20_Emphasis"><text:span text:style-name="T11">сновной объём потребляемой памяти зависит от выбранной модели и типа квантования. Однако при загрузке в оперативную память требуется дополнительное пространство для KV-кэша, размер которого пропорционален контекстному окну и количеству параллельных сессий.</text:span></text:span></text:p>
      <text:p text:style-name="Text_20_body"><text:span text:style-name="Strong_20_Emphasis"><text:span text:style-name="T11">Многопользовательская нагрузка — </text:span></text:span><text:span text:style-name="Strong_20_Emphasis"><text:span text:style-name="T21">п</text:span></text:span><text:span text:style-name="Strong_20_Emphasis"><text:span text:style-name="T11">ри параллельной обработке запросов от нескольких пользователей требования к памяти, GPU и CPU возрастают пропорционально количеству одновременных сессий. Каждый параллельный слот требует выделения собственного KV-кэша.</text:span></text:span></text:p>
      <text:p text:style-name="Text_20_body"><text:span text:style-name="Strong_20_Emphasis"><text:span text:style-name="T11">Размер контекстного окна — </text:span></text:span><text:span text:style-name="Strong_20_Emphasis"><text:span text:style-name="T21">у</text:span></text:span><text:span text:style-name="Strong_20_Emphasis"><text:span text:style-name="T11">величение контекстного окна существенно повышает потребление памяти. Зависимость линейная: при удвоении контекстного окна вдвое возрастает размер KV-кэша на каждую сессию.</text:span></text:span></text:p>
      <text:p text:style-name="P38"><text:span text:style-name="Strong_20_Emphasis"><text:span text:style-name="T21"/></text:span></text:p>
      <text:list text:continue-numbering="true" text:style-name="WWNum1">
        <text:list-item>
          <text:list>
            <text:list-item>
              <text:h text:style-name="P39" text:outline-level="2"><text:bookmark-start text:name="__RefHeading___Toc6263_1378716561"/><text:span text:style-name="Strong_20_Emphasis"><text:span text:style-name="T22">2.2 </text:span></text:span><text:span text:style-name="Strong_20_Emphasis"><text:span text:style-name="T23">Требования к ОЗУ</text:span></text:span><text:span text:style-name="Strong_20_Emphasis"><text:span text:style-name="T22"> </text:span></text:span><text:bookmark-end text:name="__RefHeading___Toc6263_1378716561"/></text:h>
            </text:list-item>
          </text:list>
        </text:list-item>
      </text:list>
      <text:p text:style-name="P38"><text:span text:style-name="Strong_20_Emphasis"/></text:p>
      <text:p text:style-name="P38"><text:span text:style-name="Strong_20_Emphasis"><text:span text:style-name="T11">Общий объём оперативной памяти, необходимый для работы llama-server в многопользовательской среде, складывается из трёх основных компонентов.</text:span></text:span></text:p>
      <text:p text:style-name="P38"><text:span text:style-name="Strong_20_Emphasis"><text:span text:style-name="T11">Общий объём оперативной памяти для llama-server складывается из трёх составляющих.</text:span></text:span></text:p>
      <text:p text:style-name="P38"><text:span text:style-name="Strong_20_Emphasis"><text:span text:style-name="T11">Размер модели — определяется количеством параметров и типом квантования. Например, модель 7B в Q4_K_M занимает ~4 ГБ, а в Q8_0 — уже ~7 ГБ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50_1321148769">6</text:bookmark-ref></text:span></text:span><text:span text:style-name="Strong_20_Emphasis"><text:span text:style-name="T18">]</text:span></text:span><text:span text:style-name="Strong_20_Emphasis"><text:span text:style-name="T11">. Чем выше точность квантования, тем больше памяти требуется.</text:span></text:span></text:p>
      <text:p text:style-name="P38"><text:span text:style-name="Strong_20_Emphasis"><text:span text:style-name="T11">KV-кэш — выделяется для каждой параллельной сессии и хранит промежуточные состояния токенов контекстного окна. Его размер зависит от архитектуры модели, длины контекста и количества одновременных сессий. При увеличении контекстного окна с 2048 до 8192 токенов потребление памяти на сессию растёт в четыре раза. Каждая новая параллельная сессия добавляет свой KV-кэш.</text:span></text:span></text:p>
      <text:p text:style-name="P38"><text:span text:style-name="Strong_20_Emphasis"><text:span text:style-name="T11">Служебные расходы — буферы, очереди и управляющие структуры, обычно составляющие 5-10% от основного объёма.</text:span></text:span></text:p>
      <text:p text:style-name="P38"><text:span text:style-name="Strong_20_Emphasis"><text:span text:style-name="T11">Таким образом, итоговое потребление памяти всегда больше простого размера модели. Для модели 7B с контекстом 4096 токенов и тремя параллельными сессиями требуется 8-12 ГБ, для модели 13B при тех же условиях — 16-20 ГБ.</text:span></text:span></text:p>
      <text:p text:style-name="P38"><text:span text:style-name="Strong_20_Emphasis"><text:span text:style-name="T11">Для одного пользователя модели 7B достаточно 6-8 ГБ ОЗУ. Для трёх-четырёх разработчиков — уже 16 ГБ. Для модели 13B и пяти пользователей рекомендуется 32 ГБ. Также стоит учитывать, что длинные ответы увеличивают заполнение KV-кэша, что дополнительно повышает потребление памяти.</text:span></text:span></text:p>
      <text:list text:continue-numbering="true" text:style-name="WWNum1">
        <text:list-item>
          <text:list>
            <text:list-item>
              <text:h text:style-name="P40" text:outline-level="2"><text:bookmark-start text:name="__RefHeading___Toc6265_1378716561"/><text:soft-page-break/><text:span text:style-name="Strong_20_Emphasis"><text:span text:style-name="T23">2.3 Требования к CPU и GPU</text:span></text:span><text:bookmark-end text:name="__RefHeading___Toc6265_1378716561"/></text:h>
            </text:list-item>
          </text:list>
        </text:list-item>
      </text:list>
      <text:p text:style-name="P41"><text:span text:style-name="Strong_20_Emphasis"/></text:p>
      <text:p text:style-name="Text_20_body"><text:span text:style-name="Strong_20_Emphasis"><text:span text:style-name="T11">llama.cpp эффективно работает как на x86_64, так и на AArch64 архитектурах. При использовании CPU для вычислений критическое значение имеет количество ядер и поддержка векторных инструкций (AVX2, AVX-512 для Intel/AMD или NEON для ARM).</text:span></text:span></text:p>
      <text:p text:style-name="Text_20_body"><text:span text:style-name="Strong_20_Emphasis"><text:span text:style-name="T11">Для многопользовательских сценариев на серверах с большим количеством ядер рекомендуется использовать CPU affinity для привязки процессов к конкретным ядрам, </text:span></text:span><text:span text:style-name="Strong_20_Emphasis"><text:span text:style-name="T24">а так же </text:span></text:span><text:span text:style-name="Strong_20_Emphasis"><text:span text:style-name="T11">NUMA-aware оптимизации для работы с неоднородной памятью.</text:span></text:span></text:p>
      <text:p text:style-name="Text_20_body"><text:span text:style-name="Strong_20_Emphasis"><text:span text:style-name="T11">При использовании GPU для ускорения вычислений (с параметром -ngl) достаточно 2-4 ядер CPU для управления передачей данных между памятью и GPU. Основная нагрузка ложится на видеокарту, поэтому критическими становятся объём VRAM и пропускная способность памяти.</text:span></text:span></text:p>
      <text:list xml:id="list213436321753399" text:continue-numbering="true" text:style-name="WWNum1">
        <text:list-item>
          <text:list>
            <text:list-item>
              <text:list>
                <text:list-item>
                  <text:h text:style-name="Heading_20_2" text:outline-level="2"><text:bookmark-start text:name="__RefHeading___Toc6267_1378716561"/><text:span text:style-name="Strong_20_Emphasis">2.4 Требования к дисковому пространству</text:span><text:bookmark-end text:name="__RefHeading___Toc6267_1378716561"/></text:h>
                </text:list-item>
              </text:list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11">Дисковое пространство необходимо для хранения файлов моделей и логов сервера:</text:span></text:span></text:p>
      <text:p text:style-name="Text_20_body"><text:span text:style-name="Strong_20_Emphasis"><text:span text:style-name="T11">Файлы моделей — вес зависит от количества параметров и типа квантования:</text:span></text:span></text:p>
      <text:list text:style-name="L1">
        <text:list-item>
          <text:list>
            <text:list-item>
              <text:p text:style-name="P42"><text:span text:style-name="Strong_20_Emphasis"><text:span text:style-name="T11">Модель 7B в Q4_K_M: ~3.5-4 ГБ;</text:span></text:span></text:p>
            </text:list-item>
            <text:list-item>
              <text:p text:style-name="P42"><text:span text:style-name="Strong_20_Emphasis"><text:span text:style-name="T11">Модель 13B в Q4_K_M: ~7-8 ГБ;</text:span></text:span></text:p>
            </text:list-item>
            <text:list-item>
              <text:p text:style-name="P42"><text:span text:style-name="Strong_20_Emphasis"><text:span text:style-name="T11">Модель 70B в Q4_K_M: ~35-40 ГБ.</text:span></text:span></text:p>
            </text:list-item>
          </text:list>
        </text:list-item>
      </text:list>
      <text:p text:style-name="Text_20_body"><text:span text:style-name="Strong_20_Emphasis"><text:span text:style-name="T11">Логирование — рекомендуется выделить 5-10 ГБ для хранения истории запросов и системных логов.</text:span></text:span></text:p>
      <text:p text:style-name="Text_20_body"><text:soft-page-break/><text:span text:style-name="Strong_20_Emphasis"><text:span text:style-name="T11">Системные требования ОС — от 20 до 40 ГБ в зависимости от дистрибутива Linux.</text:span></text:span></text:p>
      <text:p text:style-name="Text_20_body"><text:span text:style-name="Strong_20_Emphasis"><text:span text:style-name="T11">Рекомендуемый общий объём: от 32 ГБ для комфортной работы.</text:span></text:span></text:p>
      <text:list text:continue-list="list213436321753399" text:style-name="WWNum1">
        <text:list-item>
          <text:list>
            <text:list-item>
              <text:h text:style-name="P43" text:outline-level="2"><text:bookmark-start text:name="__RefHeading___Toc6269_1378716561"/><text:span text:style-name="Strong_20_Emphasis"><text:span text:style-name="T25">2.5 Сетевые требования </text:span></text:span><text:bookmark-end text:name="__RefHeading___Toc6269_1378716561"/></text:h>
            </text:list-item>
          </text:list>
        </text:list-item>
      </text:list>
      <text:p text:style-name="P44"><text:span text:style-name="Strong_20_Emphasis"/></text:p>
      <text:p text:style-name="P44"><text:span text:style-name="Strong_20_Emphasis"><text:span text:style-name="T11">Для работы в локальной сети высоких требований к пропускной способности канала нет, так как происходит лишь передача текстовой информации (входящие запросы и исходящие ответы). Средний размер запроса/ответа не превышает нескольких килобайт, поэтому даже стандартного Gigabit Ethernet (1 Гбит/с) достаточно для обслуживания десятков пользователей.</text:span></text:span></text:p>
      <text:p text:style-name="P44"><text:span text:style-name="Strong_20_Emphasis"><text:span text:style-name="T11">Для упрощения настройки рекомендуется статический IP-адрес сервера. Сервер привязывается к порту (по умолчанию 8080) и сетевому интерфейсу 0.0.0.0 для обеспечения доступности из локальной сети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6271_1378716561"/><text:span text:style-name="Strong_20_Emphasis">2.6 Итоговые минимальные требования для реальной эксплуатации</text:span><text:bookmark-end text:name="__RefHeading___Toc6271_1378716561"/></text:h>
            </text:list-item>
          </text:list>
        </text:list-item>
      </text:list>
      <text:p text:style-name="P44"><text:span text:style-name="Strong_20_Emphasis"><text:span text:style-name="T11"/></text:span></text:p>
      <text:p text:style-name="P44"><text:span text:style-name="Strong_20_Emphasis"><text:span text:style-name="T11">На основе проведённого анализа, для сервера, обслуживающего 5-10 разработчиков с моделью 7B-13B параметров, </text:span></text:span><text:span text:style-name="Strong_20_Emphasis"><text:span text:style-name="T26">аппаратные требования представленны в таблице </text:span></text:span><text:span text:style-name="Strong_20_Emphasis"><text:span text:style-name="T26"><text:sequence-ref text:reference-format="value" text:ref-name="refTable0">1</text:sequence-ref></text:span></text:span><text:span text:style-name="Strong_20_Emphasis"><text:span text:style-name="T11">:</text:span></text:span></text:p>
      <text:p text:style-name="P45">Таблица <text:sequence text:ref-name="refTable0" text:name="Table" text:formula="ooow:Table+1" style:num-format="1">1</text:sequence>: Аппаратные требования к серверу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Компонент</text:p>
          </table:table-cell>
          <table:table-cell table:style-name="Таблица1.A1" office:value-type="string">
            <text:p text:style-name="P46">Минимальные требования</text:p>
          </table:table-cell>
          <table:table-cell table:style-name="Таблица1.C1" office:value-type="string">
            <text:p text:style-name="P46">Рекомендуемые требования</text:p>
          </table:table-cell>
        </table:table-row>
        <table:table-row>
          <table:table-cell table:style-name="Таблица1.A2" office:value-type="string">
            <text:p text:style-name="P47">СPU</text:p>
          </table:table-cell>
          <table:table-cell table:style-name="Таблица1.A2" office:value-type="string">
            <text:p text:style-name="P46">8 ядер </text:p>
          </table:table-cell>
          <table:table-cell table:style-name="Таблица1.C2" office:value-type="string">
            <text:p text:style-name="P48">16 ядер</text:p>
          </table:table-cell>
        </table:table-row>
        <table:table-row>
          <table:table-cell table:style-name="Таблица1.A2" office:value-type="string">
            <text:p text:style-name="P47">RAM</text:p>
          </table:table-cell>
          <table:table-cell table:style-name="Таблица1.A2" office:value-type="string">
            <text:p text:style-name="P46">16 ГБ</text:p>
          </table:table-cell>
          <table:table-cell table:style-name="Таблица1.C2" office:value-type="string">
            <text:p text:style-name="P48">64 ГБ</text:p>
          </table:table-cell>
        </table:table-row>
        <table:table-row>
          <table:table-cell table:style-name="Таблица1.A2" office:value-type="string">
            <text:p text:style-name="P47">GPU (опционально)</text:p>
          </table:table-cell>
          <table:table-cell table:style-name="Таблица1.A2" office:value-type="string">
            <text:p text:style-name="P46">NVIDIA с 8 ГБ VRAM</text:p>
          </table:table-cell>
          <table:table-cell table:style-name="Таблица1.C2" office:value-type="string">
            <text:p text:style-name="P49">NVIDIA с <text:span text:style-name="T27">16</text:span> ГБ VRAM</text:p>
          </table:table-cell>
        </table:table-row>
        <table:table-row table:style-name="Таблица1.5">
          <table:table-cell table:style-name="Таблица1.A2" office:value-type="string">
            <text:p text:style-name="P47">Накопитель</text:p>
          </table:table-cell>
          <table:table-cell table:style-name="Таблица1.A2" office:value-type="string">
            <text:p text:style-name="P46">64 Г<text:span text:style-name="T27">Б SSD</text:span></text:p>
          </table:table-cell>
          <table:table-cell table:style-name="Таблица1.C2" office:value-type="string">
            <text:p text:style-name="P48">128 ГБ SSD</text:p>
          </table:table-cell>
        </table:table-row>
        <table:table-row>
          <table:table-cell table:style-name="Таблица1.A2" office:value-type="string">
            <text:p text:style-name="P47">Сеть</text:p>
          </table:table-cell>
          <table:table-cell table:style-name="Таблица1.A2" office:value-type="string">
            <text:p text:style-name="P50">Gigabit Ethernet</text:p>
          </table:table-cell>
          <table:table-cell table:style-name="Таблица1.C2" office:value-type="string">
            <text:p text:style-name="P51">Gigabit Ethernet</text:p>
          </table:table-cell>
        </table:table-row>
      </table:table>
      <text:p text:style-name="P44"><text:span text:style-name="Strong_20_Emphasis"><text:span text:style-name="T11"/></text:span></text:p>
      <text:list xml:id="list213437035134921" text:continue-numbering="true" text:style-name="WWNum1">
        <text:list-item>
          <text:list>
            <text:list-item>
              <text:h text:style-name="P52" text:outline-level="2"><text:bookmark-start text:name="__RefHeading___Toc6273_1378716561"/><text:span text:style-name="Strong_20_Emphasis"><text:span text:style-name="T28">2.7 Конфигурация для курсовой работы</text:span></text:span><text:bookmark-end text:name="__RefHeading___Toc6273_1378716561"/></text:h>
            </text:list-item>
          </text:list>
        </text:list-item>
      </text:list>
      <text:p text:style-name="P53"><text:span text:style-name="Strong_20_Emphasis"/></text:p>
      <text:p text:style-name="P53"><text:span text:style-name="Strong_20_Emphasis"><text:span text:style-name="T11">Для демонстрационных целей и отработки навыков развёртывания в рамках курсовой работы </text:span></text:span><text:span text:style-name="Strong_20_Emphasis"><text:span text:style-name="T29">я выбрал</text:span></text:span><text:span text:style-name="Strong_20_Emphasis"><text:span text:style-name="T11"> упрощ</text:span></text:span><text:span text:style-name="Strong_20_Emphasis"><text:span text:style-name="T29">е</text:span></text:span><text:span text:style-name="Strong_20_Emphasis"><text:span text:style-name="T11">нн</text:span></text:span><text:span text:style-name="Strong_20_Emphasis"><text:span text:style-name="T29">ую</text:span></text:span><text:span text:style-name="Strong_20_Emphasis"><text:span text:style-name="T11"> конфигурация на личном компьютере. Данная конфигурация не удовлетворяет требованиям к реальной многопользовательской среде, но позволяет </text:span></text:span><text:span text:style-name="Strong_20_Emphasis"><text:span text:style-name="T29">полнлостью пройти цикл установки и настройки llama-server; освоить конфигурирование параметров запуска; протестировать интеграцию со средой разработки; проверить работоспособность связки инструментов.</text:span></text:span></text:p>
      <text:p text:style-name="P53"><text:span text:style-name="Strong_20_Emphasis"><text:span text:style-name="T29">Для экспериментов была выбрана квантованная модель Qwen2.5-Coder-1.5B в формате GGUF с квантованием Q8_0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52_1321148769">7</text:bookmark-ref></text:span></text:span><text:span text:style-name="Strong_20_Emphasis"><text:span text:style-name="T18">]</text:span></text:span><text:span text:style-name="Strong_20_Emphasis"><text:span text:style-name="T29">. Выбор модели определялся следующими факторами:</text:span></text:span></text:p>
      <text:list text:style-name="L2">
        <text:list-item>
          <text:list>
            <text:list-item>
              <text:p text:style-name="P54"><text:span text:style-name="Strong_20_Emphasis"><text:span text:style-name="T29">Малый размер файла модели (~1.8 ГБ), что позволяет загрузить её на ограниченном оборудовании.</text:span></text:span></text:p>
            </text:list-item>
            <text:list-item>
              <text:p text:style-name="P54"><text:span text:style-name="Strong_20_Emphasis"><text:span text:style-name="T29">Достаточное качество ответов на русском языке для демонстрации работы.</text:span></text:span></text:p>
            </text:list-item>
            <text:list-item>
              <text:p text:style-name="P54"><text:span text:style-name="Strong_20_Emphasis"><text:span text:style-name="T29">Возможность запуска как на CPU, так и с частичной загрузкой слоёв на GPU.</text:span></text:span></text:p>
            </text:list-item>
          </text:list>
        </text:list-item>
      </text:list>
      <text:h text:style-name="P25" text:outline-level="1"/>
      <text:list text:continue-list="list213437035134921" text:style-name="WWNum1">
        <text:list-item>
          <text:h text:style-name="P26" text:outline-level="1"><text:bookmark-start text:name="__RefHeading___Toc4607_3774095318"/>3 РАЗРАБОТКА КОНФИГУРАЦИИ СЕРВЕРА<text:bookmark-end text:name="__RefHeading___Toc4607_3774095318"/></text:h>
        </text:list-item>
      </text:list>
      <text:p text:style-name="P17"/>
      <text:p text:style-name="P55">Серверная платформа была разработана на Arch Linu. Выбор конкретного дистрибутива Linux не имеет значения. Llama.cpp компилируется из исходного кода и будет работать любом дистрибутиве с поддержкой компилятора g++. Модель запускалась на процессоре, а также часть слоев на GPU.</text:p>
      <text:list text:continue-numbering="true" text:style-name="WWNum1">
        <text:list-item>
          <text:list>
            <text:list-item>
              <text:h text:style-name="P28" text:outline-level="2"><text:bookmark-start text:name="__RefHeading___Toc4609_3774095318"/>3.1 Подготовка програмного окружения<text:bookmark-end text:name="__RefHeading___Toc4609_3774095318"/></text:h>
            </text:list-item>
          </text:list>
        </text:list-item>
      </text:list>
      <text:p text:style-name="P56"/>
      <text:p text:style-name="P17">Llama.cpp собирается из исходного кода, из репозитория проекта на GitHub <text:span text:style-name="T9">[</text:span><text:span text:style-name="T9"><text:bookmark-ref text:reference-format="number" text:ref-name="__RefNumPara__13146_1321148769">3</text:bookmark-ref></text:span><text:span text:style-name="T9">]</text:span>. Компиляция производилась прямо на <text:span text:style-name="T30">компьютере</text:span> при помощи CMake, что делает исполняемые файлы оптимизироваными для конкректного процессора.</text:p>
      <text:p text:style-name="P57">Для работы на ограниченном оборудовании была выбрана квантованная модель <text:span text:style-name="T30">Q</text:span><text:span text:style-name="T31">wen2.5-coder</text:span> в формате GGUF с квантованием Q<text:span text:style-name="T30">8</text:span>_0. Выбор модели определялся её малым размером (~<text:span text:style-name="T30">1,8ГБ</text:span>) и при этом достаточным качеством ответов на русском языке. Модель была размещена в отдельной директории для удобства работы.</text:p>
      <text:list text:continue-numbering="true" text:style-name="WWNum1">
        <text:list-item>
          <text:list>
            <text:list-item>
              <text:h text:style-name="P28" text:outline-level="2"><text:bookmark-start text:name="__RefHeading___Toc4611_3774095318"/>3.2 Скрипт запуска сервера <text:bookmark-end text:name="__RefHeading___Toc4611_3774095318"/></text:h>
            </text:list-item>
          </text:list>
        </text:list-item>
      </text:list>
      <text:p text:style-name="P56"/>
      <text:p text:style-name="P58">Для удобного запуска llama-server необходимо написать bush скрипт, скрипт на рисунке <text:sequence-ref text:reference-format="value" text:ref-name="refDrawing0">1</text:sequence-ref>:</text:p>
      <text:p text:style-name="P58"><draw:frame draw:style-name="fr2" draw:name="Врезка4" text:anchor-type="char" svg:width="16.501cm" draw:z-index="0"><draw:text-box fo:min-height="14.63cm"><text:p text:style-name="Drawing"><draw:frame draw:style-name="fr3" draw:name="Изображение4" text:anchor-type="paragraph" svg:width="16.501cm" style:rel-width="100%" svg:height="14.63cm" style:rel-height="scale" draw:z-index="1"><draw:image xlink:href="Pictures/100000010000028D0000024311404570.png" xlink:type="simple" xlink:show="embed" xlink:actuate="onLoad" draw:mime-type="image/png"/></draw:frame>Рисунок <text:sequence text:ref-name="refDrawing0" text:name="Drawing" text:formula="ooow:Drawing+1" style:num-format="1">1</text:sequence><text:s/>- Скрипт запуска сервера</text:p></draw:text-box></draw:frame><text:soft-page-break/></text:p>
      <text:p text:style-name="P17" loext:marker-style-name="T13"><text:span text:style-name="T13">Параметр «-c </text:span><text:span text:style-name="T32">4096</text:span><text:span text:style-name="T13">» был выбран как компромиссное значение: для многих задач, контекста в </text:span><text:span text:style-name="T32">4096</text:span><text:span text:style-name="T13"> токена достаточно. </text:span><text:span text:style-name="T32">Параметр «-ngl 33» загружает 33 слоя модели в видеопамять и они обрабатываются GPU.</text:span><text:span text:style-name="T13"> </text:span><text:span text:style-name="T32">Параметр «--threads 4» отвечает за количество ядер процессора отведенных под вычесления. </text:span><text:span text:style-name="T13">Параметр «--parallel 2» позволяет серверу обрабатывать до двух запросов одновременно, что критически важно при интеграции с несколькими клиентами в локальной сети </text:span><text:span text:style-name="T33">[</text:span><text:span text:style-name="T33"><text:bookmark-ref text:reference-format="number" text:ref-name="__RefNumPara__13146_1321148769">3</text:bookmark-ref></text:span><text:span text:style-name="T33">]</text:span><text:span text:style-name="T13">.</text:span></text:p>
      <text:h text:style-name="P59" text:outline-level="2"/>
      <text:list text:continue-numbering="true" text:style-name="WWNum1">
        <text:list-item>
          <text:list>
            <text:list-item>
              <text:h text:style-name="P60" text:outline-level="2"><text:bookmark-start text:name="__RefHeading___Toc4613_3774095318"/>3.3 Работа модели<text:bookmark-end text:name="__RefHeading___Toc4613_3774095318"/></text:h>
            </text:list-item>
          </text:list>
        </text:list-item>
      </text:list>
      <text:p text:style-name="P56"/>
      <text:p text:style-name="P61">Для проверки работоспособности модели я <text:span text:style-name="T34">на компьютере</text:span> открыл в браузере веб интерфейс llama-srver по адресу «hhtp://<text:span text:style-name="T34">127.0.0.1</text:span>:<text:span text:style-name="T34">8080</text:span>». В чате с моделью протестировал тестовый промт, <text:span text:style-name="T35">резултат на рисунке </text:span><text:span text:style-name="T35"><text:sequence-ref text:reference-format="value" text:ref-name="refDrawing1">2</text:sequence-ref></text:span><text:span text:style-name="T35">:</text:span></text:p>
      <text:p text:style-name="P61"><draw:frame draw:style-name="fr4" draw:name="Врезка1" text:anchor-type="char" svg:width="16.501cm" draw:z-index="2"><draw:text-box fo:min-height="15.205cm"><text:p text:style-name="Drawing"><draw:frame draw:style-name="fr3" draw:name="Изображение2" text:anchor-type="paragraph" svg:width="16.501cm" style:rel-width="100%" svg:height="15.205cm" style:rel-height="scale" draw:z-index="3"><draw:image xlink:href="Pictures/10000001000003620000031EF8BE9D40.png" xlink:type="simple" xlink:show="embed" xlink:actuate="onLoad" draw:mime-type="image/png"/></draw:frame>Рисунок <text:sequence text:ref-name="refDrawing1" text:name="Drawing" text:formula="ooow:Drawing+1" style:num-format="1">2</text:sequence><text:s/>- Вэб интерфейс сервера</text:p></draw:text-box></draw:frame></text:p>
      <text:p text:style-name="P61">Модель успешно дала ответ на запрос, что свидетельствует о правильной работе llama-server.</text:p>
      <text:h text:style-name="P25" text:outline-level="1"/>
      <text:list text:continue-numbering="true" text:style-name="WWNum1">
        <text:list-item>
          <text:h text:style-name="P26" text:outline-level="1"><text:bookmark-start text:name="__RefHeading___Toc6072_3774095318"/>4 РЕАЛИЗАЦИЯ ИНТЕГРАЦИИ ЛОКАЛЬНОГО LLM-СЕРВЕРА СО СРЕДОЙ РАЗРАБОТКИ CODE OSS<text:bookmark-end text:name="__RefHeading___Toc6072_3774095318"/></text:h>
          <text:list>
            <text:list-item>
              <text:h text:style-name="P28" text:outline-level="2"><text:bookmark-start text:name="__RefHeading___Toc6074_3774095318"/>4.1 Выбор инструмента интеграции: расширение Continue<text:bookmark-end text:name="__RefHeading___Toc6074_3774095318"/></text:h>
            </text:list-item>
          </text:list>
        </text:list-item>
      </text:list>
      <text:p text:style-name="P56"/>
      <text:p text:style-name="P17" loext:marker-style-name="T11"><text:span text:style-name="T11">Для интеграции разработанного локального LLM-сервера в среду разработки был выбран инструмент Continue — открытое расширение (плагин) для Visual Studio Code и его форков, включая Code OSS </text:span><text:span text:style-name="T18">[</text:span><text:span text:style-name="T18"><text:bookmark-ref text:reference-format="number" text:ref-name="__RefNumPara__13154_1321148769">5</text:bookmark-ref></text:span><text:span text:style-name="T18">]</text:span><text:span text:style-name="T11">. Continue позиционируется как AI-ассистент для разработчиков, поддерживающий подключение к различным моделям, включая локальные</text:span></text:p>
      <text:p text:style-name="P17" loext:marker-style-name="T11"><text:span text:style-name="T11">Важно отметить, что Continue доступен не только в официальном Visual Studio Code от Microsoft, но и в Code OSS — полностью открытой версии редактора, распространяемой под лицензией MIT </text:span><text:span text:style-name="T18">[</text:span><text:span text:style-name="T18"><text:bookmark-ref text:reference-format="number" text:ref-name="__RefNumPara__13156_1321148769">8</text:bookmark-ref></text:span><text:span text:style-name="T18">]</text:span><text:span text:style-name="T11">. Это позволяет использовать расширение в среде разработки, где приоритетом является полная открытость и отсутствие телеметрии Microsoft.</text:span></text:p>
      <text:p text:style-name="P17">Continue использует конфигурационный файл в формате YAML, который по умолчанию находится в директории ~/.continue/config.yaml (в Linux-системах) <text:span text:style-name="T9">[</text:span><text:span text:style-name="T9"><text:bookmark-ref text:reference-format="number" text:ref-name="__RefNumPara__13154_1321148769">5</text:bookmark-ref></text:span><text:span text:style-name="T9">]</text:span>. Для подключения к локальному серверу на базе llama.cpp была создана следующая конфигурация, <text:span text:style-name="T36">на рисунке </text:span><text:span text:style-name="T36"><text:sequence-ref text:reference-format="value" text:ref-name="refDrawing2">3</text:sequence-ref></text:span>:</text:p>
      <text:p text:style-name="P17"><draw:frame draw:style-name="fr2" draw:name="Врезка5" text:anchor-type="char" svg:width="15.953cm" draw:z-index="4"><draw:text-box fo:min-height="12.434cm"><text:p text:style-name="Drawing"><draw:frame draw:style-name="fr3" draw:name="Изображение5" text:anchor-type="paragraph" svg:width="15.953cm" style:rel-width="100%" svg:height="12.434cm" style:rel-height="scale" draw:z-index="5"><draw:image xlink:href="Pictures/100000010000025B000001D6A176FB4A.png" xlink:type="simple" xlink:show="embed" xlink:actuate="onLoad" draw:mime-type="image/png"/></draw:frame>Рисунок <text:sequence text:ref-name="refDrawing2" text:name="Drawing" text:formula="ooow:Drawing+1" style:num-format="1">3</text:sequence><text:s/>- Конфигурация плагина Continue</text:p></draw:text-box></draw:frame><text:soft-page-break/></text:p>
      <text:list text:continue-numbering="true" text:style-name="WWNum1">
        <text:list-item>
          <text:list>
            <text:list-item>
              <text:h text:style-name="P28" text:outline-level="2"><text:bookmark-start text:name="__RefHeading___Toc6078_3774095318"/>4.<text:span text:style-name="T37">2</text:span> Проверка работоспособности интеграции<text:bookmark-end text:name="__RefHeading___Toc6078_3774095318"/></text:h>
            </text:list-item>
          </text:list>
        </text:list-item>
      </text:list>
      <text:p text:style-name="P56"/>
      <text:p text:style-name="P17">После сохранения конфигурации и перезагрузки Code OSS расширение Continue установило соединение с llama-server. Успешность подключения подтверждалась появлением имени модели «Local llama-server» в интерфейсе Continue (нижняя панель чата).</text:p>
      <text:p text:style-name="P17">Для проверки качества работы модели был отправлен <text:span text:style-name="T38">запрос на написание прграммы для рисования квадрата из выбранного символа</text:span>. Резултат на рисунке <text:sequence-ref text:reference-format="value" text:ref-name="refDrawing3">4</text:sequence-ref>.</text:p>
      <text:p text:style-name="P62"><draw:frame draw:style-name="fr2" draw:name="Врезка2" text:anchor-type="char" svg:width="16.501cm" draw:z-index="6"><draw:text-box fo:min-height="16.545cm"><text:p text:style-name="Drawing"><draw:frame draw:style-name="fr3" draw:name="Изображение1" text:anchor-type="paragraph" svg:width="16.501cm" style:rel-width="100%" svg:height="15.896cm" style:rel-height="scale" draw:z-index="7"><draw:image xlink:href="Pictures/10000001000003340000031669205A5B.png" xlink:type="simple" xlink:show="embed" xlink:actuate="onLoad" draw:mime-type="image/png"/></draw:frame>Рисунок <text:sequence text:ref-name="refDrawing3" text:name="Drawing" text:formula="ooow:Drawing+1" style:num-format="1">4</text:sequence><text:s/>- Код сгенерированный моделью</text:p></draw:text-box></draw:frame><text:soft-page-break/>Код успешно компилируется и работает, <text:span text:style-name="T39">показано на рисунке </text:span><text:span text:style-name="T39"><text:sequence-ref text:reference-format="value" text:ref-name="refDrawing4">5</text:sequence-ref></text:span><text:span text:style-name="T39">:</text:span></text:p>
      <text:p text:style-name="P62"><draw:frame draw:style-name="fr2" draw:name="Врезка3" text:anchor-type="char" svg:width="16.501cm" draw:z-index="8"><draw:text-box fo:min-height="7.948cm"><text:p text:style-name="Drawing"><draw:frame draw:style-name="fr3" draw:name="Изображение3" text:anchor-type="paragraph" svg:width="16.501cm" style:rel-width="100%" svg:height="7.948cm" style:rel-height="scale" draw:z-index="9"><draw:image xlink:href="Pictures/10000001000002AB00000149F8E2F9B8.png" xlink:type="simple" xlink:show="embed" xlink:actuate="onLoad" draw:mime-type="image/png"/></draw:frame>Рисунок <text:sequence text:ref-name="refDrawing4" text:name="Drawing" text:formula="ooow:Drawing+1" style:num-format="1">5</text:sequence><text:s/>- Компиляция и работа программы</text:p></draw:text-box></draw:frame><text:soft-page-break/></text:p>
      <text:list text:continue-numbering="true" text:style-name="WWNum1">
        <text:list-item>
          <text:list>
            <text:list-item>
              <text:h text:style-name="P28" text:outline-level="2"><text:bookmark-start text:name="__RefHeading___Toc775_3015941620"/>4.<text:span text:style-name="T37">3</text:span> Выводы по интеграции<text:bookmark-end text:name="__RefHeading___Toc775_3015941620"/></text:h>
            </text:list-item>
          </text:list>
        </text:list-item>
      </text:list>
      <text:p text:style-name="P56"/>
      <text:p text:style-name="P17">Интеграция локального LLM-сервера с Code OSS через расширение Continue была успешно реализована на уровне подключения: клиент (Code OSS) установил соединение с сервером (llama-server) в локальной сети и смог отправлять запросы на генерацию. Однако практическая <text:span text:style-name="T37">польза данной конфигурации </text:span><text:span text:style-name="T39">мала из-за слабого оборудования и маленькой модели.</text:span></text:p>
      <text:p text:style-name="P63">Данный результат, тем не менее, имеет ценность: он демонстрирует принципиальную достижимость цели — локальный LLM-сервер может быть интегрирован в среду разработки, заменяя облачные решения. Для повышения качества генерации потребуется использование более крупных моделей, <text:span text:style-name="T40">например Qwen3.6-27B на 27 млрд параметров</text:span>, что, в свою очередь, потребует более мощного серверного оборудования.</text:p>
      <text:list text:continue-numbering="true" text:style-name="WWNum1">
        <text:list-item>
          <text:h text:style-name="P64" text:outline-level="1"><text:bookmark-start text:name="__RefHeading___Toc1723_1378716561"/>Заключение<text:bookmark-end text:name="__RefHeading___Toc1723_1378716561"/></text:h>
        </text:list-item>
      </text:list>
      <text:p text:style-name="P65"/>
      <text:p text:style-name="P66">В ходе выполнения <text:span text:style-name="T41">курсовой работы</text:span> были решены все поставленные задачи, что позволило достичь цели работы — разработать и экспериментально подтвердить работоспособность локального LLM-сервера, <text:span text:style-name="T41">и интегрировать его в рабочуюю среду.</text:span></text:p>
      <text:p text:style-name="P66">На основе сравнительного анализа обоснован выбор llama.cpp (llama-server) как наиболее подходящего инструмента для многопользовательского локального развёртывания благодаря поддержке параллельных сессий, гибкому управлению ресурсами и встроенным средствам логирования.</text:p>
      <text:p text:style-name="P66">Определены аппаратные требования к серверной платформе: для обслуживания 5–10 разработчиков с моделью 7B–13B минимально необходимы 16 ГБ ОЗУ и 8 ядер CPU, рекомендуемая конфигурация — 64 ГБ ОЗУ и 16 ядер CPU с возможностью GPU-ускорения.</text:p>
      <text:p text:style-name="P66">Разработана и протестирована конфигурация сервера: выполнен скрипт запуска с параметрами, обеспечивающими стабильную работу (контекстное окно 4096 токенов, частичная выгрузка слоёв на GPU, 4 вычислительных потока, 2 параллельные сессии).</text:p>
      <text:p text:style-name="P66">Экспериментально подтверждена работоспособность интеграции с Code OSS через расширение Continue — модель успешно генерировала исполняемый программный код.</text:p>
      <text:p text:style-name="P66">Все задачи, сформулированные во введении, выполнены в полном объёме. Цель работы достигнута: локальный LLM-сервер развёрнут, администрируется в условиях локальной сети и интегрирован со средой разработки.</text:p>
      <text:list text:continue-numbering="true" text:style-name="WWNum1">
        <text:list-item>
          <text:h text:style-name="P67" text:outline-level="1"><text:bookmark-start text:name="__RefHeading___Toc6349_3015941620"/>Список использованных источников<text:bookmark-end text:name="__RefHeading___Toc6349_3015941620"/></text:h>
        </text:list-item>
      </text:list>
      <text:p text:style-name="P68"/>
      <text:p text:style-name="P69">Электронные ресурсы</text:p>
      <text:p text:style-name="P70"/>
      <text:list text:style-name="L3">
        <text:list-item>
          <text:p text:style-name="P71"><text:bookmark-start text:name="__RefNumPara__12930_1321148769"/>Stack Overflow. Stack Overflow Developer Survey 2025 [Электронный ресурс]. – URL: https://stackoverflow.co/company/press/archive/stack-overflow-2025-developer-survey Режим доступа: для незарегистрированных пользователей (дата обращения: 22.06.2026).<text:bookmark-end text:name="__RefNumPara__12930_1321148769"/></text:p>
        </text:list-item>
        <text:list-item>
          <text:p text:style-name="P71"><text:bookmark-start text:name="__RefNumPara__13142_1321148769"/>RD World Online. How Developers and Engineers Are Learning to Work with AI They Don't Fully Trust [Электронный ресурс]. – URL: https://www.rdworldonline.com/how-developers-and-engineers-are-learning-to-work-with-ai-they-dont-fully-trust Режим доступа: для незарегистрированных пользователей (дата обращения: 22.06.2026).<text:bookmark-end text:name="__RefNumPara__13142_1321148769"/></text:p>
        </text:list-item>
        <text:list-item>
          <text:p text:style-name="P71"><text:bookmark-start text:name="__RefNumPara__13146_1321148769"/>llama.cpp. GitHub Repository [Электронный ресурс]. – URL: https://github.com/ggerganov/llama.cpp Режим доступа: для незарегистрированных пользователей (дата обращения: 22.06.2026).<text:bookmark-end text:name="__RefNumPara__13146_1321148769"/></text:p>
        </text:list-item>
        <text:list-item>
          <text:p text:style-name="P71"><text:bookmark-start text:name="__RefNumPara__13144_1321148769"/>Ollama. Official Documentation [Электронный ресурс]. – URL: https://github.com/ollama/ollama Режим доступа: для незарегистрированных пользователей (дата обращения: 22.06.2026).<text:bookmark-end text:name="__RefNumPara__13144_1321148769"/></text:p>
        </text:list-item>
        <text:list-item>
          <text:p text:style-name="P71"><text:bookmark-start text:name="__RefNumPara__13154_1321148769"/>Continue. Official Documentation [Электронный ресурс]. – URL: https://docs.continue.dev Режим доступа: для незарегистрированных пользователей (дата обращения: 22.06.2026).<text:bookmark-end text:name="__RefNumPara__13154_1321148769"/></text:p>
        </text:list-item>
        <text:list-item>
          <text:p text:style-name="P71"><text:bookmark-start text:name="__RefNumPara__13150_1321148769"/>TheBloke. GGUF Model Format Explanation [Электронный ресурс]. – URL: https://huggingface.co/docs/hub/en/gguf Режим доступа: для незарегистрированных пользователей (дата обращения: 22.06.2026).<text:bookmark-end text:name="__RefNumPara__13150_1321148769"/></text:p>
        </text:list-item>
        <text:list-item>
          <text:p text:style-name="P71"><text:bookmark-start text:name="__RefNumPara__13152_1321148769"/><text:soft-page-break/>Qwen Team. Qwen2.5-Coder Model Card [Электронный ресурс]. – URL: https://huggingface.co/Qwen/Qwen2.5-Coder-1.5B Режим доступа: для незарегистрированных пользователей (дата обращения: 22.06.2026).<text:bookmark-end text:name="__RefNumPara__13152_1321148769"/></text:p>
        </text:list-item>
        <text:list-item>
          <text:p text:style-name="P71"><text:bookmark-start text:name="__RefNumPara__13156_1321148769"/>Code OSS. Official Documentation [Электронный ресурс]. – URL: https://github.com/microsoft/vscode Режим доступа: для незарегистрированных пользователей (дата обращения: 22.06.2026).<text:bookmark-end text:name="__RefNumPara__13156_1321148769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/>
    <style:font-face style:name="Times new roman3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1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WWNum1" style:list-level="1" style:class="chapter">
      <style:paragraph-properties fo:margin-top="0cm" fo:margin-bottom="0cm" style:contextual-spacing="false" fo:line-height="100%" fo:text-align="center" style:justify-single-word="false" style:snap-to-layout-grid="false"/>
      <style:text-properties fo:text-transform="uppercase" style:font-name="Times new roman1" fo:font-family="'Times new roman'" style:font-family-generic="roman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Колонтитулы" style:class="extra">
      <style:paragraph-properties text:number-lines="false" text:line-number="0"/>
    </style:style>
    <style:style style:name="Index_20_Heading" style:display-name="Index Heading" style:family="paragraph" style:parent-style-name="Заголовок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Указатель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Содержимое_20_врезки" style:display-name="Содержимое врезки" style:family="paragraph" style:parent-style-name="Standard"/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омментарий" style:family="paragraph" style:parent-style-name="Standard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Фигура" style:family="paragraph" style:parent-style-name="Caption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margin-top="0cm" fo:margin-bottom="0.21cm" style:contextual-spacing="false" fo:line-height="100%" style:page-number="auto">
        <style:tab-stops/>
      </style:paragraph-properties>
      <style:text-properties style:font-name="Times new roman2" fo:font-family="'Times new roman'" style:font-style-name="Курсив" style:font-family-generic="roman" fo:font-size="14pt" fo:font-style="normal" style:font-style-complex="oblique"/>
    </style:style>
    <style:style style:name="Содержание_20_курсовой" style:display-name="Содержание курсовой" style:family="paragraph" style:parent-style-name="Text_20_body" style:master-page-name="">
      <style:paragraph-properties fo:line-height="100%" fo:text-indent="0cm" style:auto-text-indent="false" style:page-number="auto">
        <style:tab-stops/>
      </style:paragraph-properties>
    </style:style>
    <style:style style:name="Heading_20_3" style:display-name="Heading 3" style:family="paragraph" style:parent-style-name="Heading_20_1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Times new roman3" fo:font-family="'Times new roman'" style:font-style-name="Обычный" style:font-family-generic="roman"/>
    </style:style>
    <style:style style:name="Table" style:family="paragraph" style:parent-style-name="Caption" style:class="extra">
      <style:text-properties fo:font-size="14pt" fo:font-style="normal" style:font-style-complex="oblique"/>
    </style:style>
    <style:style style:name="Без_20_имени1" style:display-name="Без имени1" style:family="paragraph" style:parent-style-name="Heading_20_1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28</text:page-number><text:bookmark-end text:name="PageNumWizard_HEADER_Базовый1"/></text:p>
      </style:head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</meta:creation-date>
    <dc:language>ru-RU</dc:language>
    <meta:print-date>2026-06-23T21:29:52.646930412</meta:print-date>
    <dc:date>2026-06-23T21:34:22.694081059</dc:date>
    <meta:editing-cycles>64</meta:editing-cycles>
    <meta:editing-duration>P1DT14H40M20S</meta:editing-duration>
    <meta:generator>LibreOffice/25.8.7.3$Linux_X86_64 LibreOffice_project/580$Build-3</meta:generator>
    <meta:printed-by>Файлы PDF</meta:printed-by>
    <meta:document-statistic meta:table-count="3" meta:image-count="5" meta:object-count="1" meta:page-count="28" meta:paragraph-count="226" meta:word-count="3141" meta:character-count="25866" meta:non-whitespace-character-count="22897"/>
    <meta:user-defined meta:name="AppVersion">15.0000</meta:user-defined>
  </office:meta>
</office:document-meta>
</file>