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00000040A59F619E5.png" manifest:media-type="image/png"/>
  <manifest:file-entry manifest:full-path="Pictures/10000001000002AA000002602A4C232F.png" manifest:media-type="image/png"/>
  <manifest:file-entry manifest:full-path="Pictures/10000001000003E8000002F82C0B3B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 style:font-family-generic="roman" style:font-pitch="variable"/>
  </office:font-face-decls>
  <office:automatic-styles>
    <style:style style:name="P1" style:family="paragraph" style:parent-style-name="Heading_20_1" style:list-style-name="">
      <style:paragraph-properties fo:margin-left="0cm" fo:text-indent="0cm" style:auto-text-indent="false" style:writing-mode="lr-tb"/>
    </style:style>
    <style:style style:name="P2" style:family="paragraph" style:parent-style-name="Text_20_body">
      <style:paragraph-properties style:writing-mode="lr-tb"/>
    </style:style>
    <style:style style:name="P3" style:family="paragraph">
      <style:paragraph-properties fo:margin-left="0.178cm" fo:margin-right="0.178cm" fo:margin-top="0.175cm" fo:margin-bottom="0cm" fo:line-height="100%" fo:text-align="start" fo:text-indent="0cm" style:punctuation-wrap="simple" style:writing-mode="lr-tb"/>
    </style:style>
    <style:style style:name="P4" style:family="paragraph" style:parent-style-name="Heading_20_1" style:list-style-name="WWNum1">
      <style:paragraph-properties fo:margin-left="0cm" fo:margin-top="0cm" fo:margin-bottom="0cm" style:contextual-spacing="false" fo:text-align="center" style:justify-single-word="false" fo:text-indent="0cm" style:auto-text-indent="false" fo:break-before="page" style:writing-mode="lr-tb"/>
    </style:style>
    <style:style style:name="P5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Text_20_body">
      <style:paragraph-properties fo:text-align="center" style:justify-single-word="false" style:writing-mode="lr-tb" loext:word-spacing-minimum="75%" loext:word-spacing-maximum="133%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Heading_20_1" style:list-style-name="WWNum1">
      <style:paragraph-properties fo:margin-left="0cm" fo:margin-top="0cm" fo:margin-bottom="0cm" style:contextual-spacing="false" fo:text-indent="0cm" style:auto-text-indent="false" fo:break-before="page" style:writing-mode="lr-tb"/>
    </style:style>
    <style:style style:name="P9" style:family="paragraph" style:parent-style-name="Text_20_body">
      <style:paragraph-properties fo:margin-top="0cm" fo:margin-bottom="0.247cm" style:contextual-spacing="false" fo:line-height="150%" fo:text-align="justify" style:justify-single-word="false" fo:text-indent="1.251cm" style:auto-text-indent="false" style:writing-mode="lr-tb" loext:word-spacing-minimum="75%" loext:word-spacing-maximum="133%"/>
    </style:style>
    <style:style style:name="P10" style:family="paragraph" style:parent-style-name="Text_20_body">
      <style:paragraph-properties style:writing-mode="lr-tb"/>
      <style:text-properties style:text-underline-style="none" fo:background-color="transparent"/>
    </style:style>
    <style:style style:name="P11" style:family="paragraph" style:parent-style-name="Text_20_body" style:list-style-name="WWNum2">
      <style:paragraph-properties style:writing-mode="lr-tb"/>
    </style:style>
    <style:style style:name="P12" style:family="paragraph" style:parent-style-name="Text_20_body" style:list-style-name="WWNum3">
      <style:paragraph-properties style:writing-mode="lr-tb"/>
    </style:style>
    <style:style style:name="P13" style:family="paragraph" style:parent-style-name="Heading_20_1" style:list-style-name="">
      <style:paragraph-properties fo:margin-left="0cm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style:punctuation-wrap="simple" style:snap-to-layout-grid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Heading_20_1" style:list-style-name="WWNum1">
      <style:paragraph-properties fo:margin-left="0cm" fo:text-indent="0cm" style:auto-text-indent="false" fo:break-before="page" style:writing-mode="lr-tb"/>
    </style:style>
    <style:style style:name="P15" style:family="paragraph" style:parent-style-name="Heading_20_2" style:list-style-name="WWNum1">
      <style:paragraph-properties fo:margin-left="0cm" fo:text-align="start" style:justify-single-word="false" fo:text-indent="1.251cm" style:auto-text-indent="false" style:writing-mode="lr-tb"/>
    </style:style>
    <style:style style:name="P16" style:family="paragraph" style:parent-style-name="Text_20_body" style:list-style-name="WWNum4">
      <style:paragraph-properties style:writing-mode="lr-tb"/>
    </style:style>
    <style:style style:name="P17" style:family="paragraph" style:parent-style-name="Text_20_body" style:list-style-name="WWNum5">
      <style:paragraph-properties style:writing-mode="lr-tb"/>
    </style:style>
    <style:style style:name="P18" style:family="paragraph" style:parent-style-name="Text_20_body">
      <style:paragraph-properties style:writing-mode="lr-tb"/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margin-top="0cm" fo:margin-bottom="0.247cm" style:contextual-spacing="false" fo:line-height="150%" fo:text-align="justify" style:justify-single-word="false" fo:text-indent="1.251cm" style:auto-text-indent="false" style:writing-mode="lr-tb" loext:word-spacing-minimum="75%" loext:word-spacing-maximum="133%"/>
      <style:text-properties fo:font-weight="normal" style:font-weight-asian="normal" style:font-weight-complex="normal"/>
    </style:style>
    <style:style style:name="P20" style:family="paragraph" style:parent-style-name="Text_20_body" style:list-style-name="WWNum6">
      <style:paragraph-properties style:writing-mode="lr-tb"/>
    </style:style>
    <style:style style:name="P21" style:family="paragraph" style:parent-style-name="Text_20_body">
      <style:paragraph-properties fo:margin-left="0cm" fo:text-indent="0cm" style:auto-text-indent="false" style:writing-mode="lr-tb"/>
      <style:text-properties fo:font-weight="normal" style:font-weight-asian="normal" style:font-weight-complex="normal"/>
    </style:style>
    <style:style style:name="P22" style:family="paragraph" style:parent-style-name="Heading_20_2" style:list-style-name="WWNum1">
      <style:paragraph-properties fo:margin-left="0cm" fo:margin-top="0cm" fo:margin-bottom="0.212cm" style:contextual-spacing="false" fo:text-align="start" style:justify-single-word="false" fo:text-indent="1.251cm" style:auto-text-indent="false" fo:break-before="page" style:writing-mode="lr-tb"/>
    </style:style>
    <style:style style:name="P23" style:family="paragraph" style:parent-style-name="Text_20_body">
      <style:paragraph-properties fo:margin-left="0cm" fo:margin-top="0cm" fo:margin-bottom="0.212cm" style:contextual-spacing="false" fo:text-align="start" style:justify-single-word="false" fo:text-indent="1.251cm" style:auto-text-indent="false" style:writing-mode="lr-tb"/>
    </style:style>
    <style:style style:name="P24" style:family="paragraph" style:parent-style-name="Text_20_body">
      <style:paragraph-properties style:writing-mode="lr-tb"/>
      <style:text-properties fo:font-variant="normal" fo:text-transform="none" fo:color="#0f1115" loext:opacity="100%" style:font-name="quote-cjk-patch" fo:font-size="12pt" fo:letter-spacing="normal" fo:font-style="normal" style:font-size-asian="12pt" style:font-style-asian="normal"/>
    </style:style>
    <style:style style:name="P25" style:family="paragraph" style:parent-style-name="Text_20_body">
      <style:paragraph-properties fo:margin-left="0cm" fo:text-align="start" style:justify-single-word="false" fo:text-indent="1.251cm" style:auto-text-indent="false" style:writing-mode="lr-tb"/>
    </style:style>
    <style:style style:name="P26" style:family="paragraph" style:parent-style-name="Text_20_body" style:list-style-name="WWNum7">
      <style:paragraph-properties style:writing-mode="lr-tb"/>
    </style:style>
    <style:style style:name="P27" style:family="paragraph" style:parent-style-name="Heading_20_2" style:list-style-name="WWNum1">
      <style:paragraph-properties fo:margin-left="0cm" fo:text-align="start" style:justify-single-word="false" fo:text-indent="1.251cm" style:auto-text-indent="false" style:writing-mode="lr-tb"/>
      <style:text-properties fo:background-color="transparent"/>
    </style:style>
    <style:style style:name="P28" style:family="paragraph" style:parent-style-name="Text_20_body">
      <style:paragraph-properties fo:margin-left="0cm" fo:text-align="start" style:justify-single-word="false" fo:text-indent="1.251cm" style:auto-text-indent="false" style:writing-mode="lr-tb"/>
      <style:text-properties fo:background-color="transparent"/>
    </style:style>
    <style:style style:name="P29" style:family="paragraph" style:parent-style-name="Text_20_body" style:list-style-name="WWNum8">
      <style:paragraph-properties style:writing-mode="lr-tb"/>
    </style:style>
    <style:style style:name="P30" style:family="paragraph" style:parent-style-name="Text_20_body" style:list-style-name="">
      <style:paragraph-properties fo:margin-left="0cm" fo:text-indent="0cm" style:auto-text-indent="false" style:writing-mode="lr-tb"/>
    </style:style>
    <style:style style:name="P31" style:family="paragraph" style:parent-style-name="Рисунок">
      <style:paragraph-properties fo:margin-top="0.212cm" fo:margin-bottom="0.212cm" style:contextual-spacing="false" fo:text-align="start" style:justify-single-word="false" style:writing-mode="lr-tb"/>
    </style:style>
    <style:style style:name="P32" style:family="paragraph">
      <loext:graphic-properties draw:fill="solid" draw:fill-color="#ffffff"/>
      <style:paragraph-properties fo:text-align="start"/>
      <style:text-properties fo:font-size="18pt"/>
    </style:style>
    <style:style style:name="P33" style:family="paragraph" style:parent-style-name="Text_20_body">
      <style:paragraph-properties fo:margin-top="0cm" fo:margin-bottom="0.247cm" style:contextual-spacing="false" fo:break-before="page" style:writing-mode="lr-tb"/>
    </style:style>
    <style:style style:name="P34" style:family="paragraph" style:parent-style-name="Text_20_body">
      <style:paragraph-properties fo:margin-top="0cm" fo:margin-bottom="0.247cm" style:contextual-spacing="false" style:writing-mode="lr-tb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Impact" style:font-family-generic="swiss" style:font-pitch="variable" fo:font-size="10pt" fo:letter-spacing="normal" fo:language="ru" fo:country="RU" fo:font-style="normal" fo:text-shadow="none" style:text-underline-style="none" fo:font-weight="bold" style:letter-kerning="true" fo:background-color="transparent" style:font-name-asian="Noto Sans" style:font-size-asian="10pt" style:language-asian="zh" style:country-asian="CN" style:font-style-asian="normal" style:font-weight-asian="bold" style:font-name-complex="FreeSans1" style:font-size-complex="10pt" style:language-complex="hi" style:country-complex="IN" style:font-style-complex="normal" style:font-weight-complex="normal" style:text-emphasize="none" style:text-scale="100%" style:font-relief="none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text-underline-style="none"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background-color="transparent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fo:background-color="transparent" loext:char-shading-value="0" style:font-weight-asian="normal" style:font-weight-complex="normal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variant="normal" fo:text-transform="none" fo:color="#0f1115" loext:opacity="100%" style:font-name="quote-cjk-patch" fo:font-size="12pt" fo:letter-spacing="normal" fo:font-style="normal" style:font-size-asian="12pt" style:font-style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13.24cm" fo:min-width="16.503cm" fo:padding-top="0cm" fo:padding-bottom="0cm" fo:padding-left="0cm" fo:padding-right="0cm" fo:wrap-option="wrap" loext:decorative="false" fo:margin-left="-0.002cm" fo:margin-right="0.002cm" fo:margin-top="0cm" fo:margin-bottom="0.002cm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12.084cm" fo:min-width="12.774cm" fo:padding-top="0cm" fo:padding-bottom="0cm" fo:padding-left="0cm" fo:padding-right="0cm" fo:wrap-option="wrap" loext:decorative="false" fo:margin-left="-0.002cm" fo:margin-right="0.002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top" draw:auto-grow-height="false" fo:min-height="18.473cm" fo:min-width="16.503cm" fo:padding-top="0cm" fo:padding-bottom="0cm" fo:padding-left="0cm" fo:padding-right="0cm" fo:wrap-option="wrap" loext:decorative="false" fo:margin-left="-0.002cm" fo:margin-right="0.002cm" fo:margin-top="0cm" fo:margin-bottom="0cm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02_3548392200"/>Титульный лист<text:bookmark-end text:name="__RefHeading___Toc102_3548392200"/></text:h>
      <text:p text:style-name="P2"/>
      <text:p text:style-name="P2">По дисциплине пм 01 мдк 01 мдк 02</text:p>
      <text:p text:style-name="P2">Разветртыване LLM сервера для разработки</text:p>
      <text:p text:style-name="P2"><office:annotation loext:resolved="false"><dc:creator>&lt;анонимный&gt;</dc:creator><dc:date>2026-06-05T21:52:19</dc:date><text:p text:style-name="P3"><text:span text:style-name="T1">Доделать титульник по кайфу</text:span></text:p></office:annotation></text:p>
      <text:p text:style-name="P2"/>
      <text:list text:style-name="WWNum1">
        <text:list-item>
          <text:h text:style-name="P4" text:outline-level="1" loext:marker-style-name="T2"><text:bookmark-start text:name="__RefHeading___Toc104_3548392200_Копия_1"/><text:span text:style-name="T2">Содержание</text:span><text:bookmark-end text:name="__RefHeading___Toc104_3548392200_Копия_1"/><text:span text:style-name="T2"/></text:h>
        </text:list-item>
      </text:list>
      <text:table-of-content text:style-name="Sect1" text:protected="true" text:name="Оглавление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102_3548392200" office:name="Титульный лист" text:style-name="Index_20_Link" text:visited-style-name="Index_20_Link">Титульный лист<text:tab/>1</text:a></text:p>
          <text:p text:style-name="P5"><text:a xlink:type="simple" xlink:href="#__RefHeading___Toc104_3548392200_%D0%9A%D0%BE%D0%BF%D0%B8%D1%8F_1" office:name="Содержание" text:style-name="Index_20_Link" text:visited-style-name="Index_20_Link">Содержание<text:tab/>2</text:a></text:p>
          <text:p text:style-name="P5"><text:a xlink:type="simple" xlink:href="#__RefHeading___Toc3200_3548392200" office:name="Термины и определения" text:style-name="Index_20_Link" text:visited-style-name="Index_20_Link">Термины и определения<text:tab/>3</text:a></text:p>
          <text:p text:style-name="P5"><text:a xlink:type="simple" xlink:href="#__RefHeading___Toc104_3548392200" office:name="Перечень сокращений и обозначений" text:style-name="Index_20_Link" text:visited-style-name="Index_20_Link">Перечень сокращений и обозначений<text:tab/>4</text:a></text:p>
          <text:p text:style-name="P5"><text:a xlink:type="simple" xlink:href="#__RefHeading___Toc4210_3548392200" office:name="Введение" text:style-name="Index_20_Link" text:visited-style-name="Index_20_Link">Введение<text:tab/>5</text:a></text:p>
          <text:p text:style-name="P5"><text:a xlink:type="simple" xlink:href="#__RefHeading___Toc866_2141837623" office:name="1 Анализ решений для локального развёртывания LLM и обоснование выбора llama.cpp" text:style-name="Index_20_Link" text:visited-style-name="Index_20_Link">1 Анализ решений для локального развёртывания LLM и обоснование выбора llama.cpp<text:tab/>6</text:a></text:p>
          <text:p text:style-name="P6"><text:a xlink:type="simple" xlink:href="#__RefHeading___Toc868_2141837623" office:name="1.1 Ollama" text:style-name="Index_20_Link" text:visited-style-name="Index_20_Link">1.1 Ollama<text:tab/>7</text:a></text:p>
          <text:p text:style-name="P6"><text:a xlink:type="simple" xlink:href="#__RefHeading___Toc735_118244425" office:name="1.2 Llama.cpp" text:style-name="Index_20_Link" text:visited-style-name="Index_20_Link">1.2 Llama.cpp<text:tab/>8</text:a></text:p>
          <text:p text:style-name="P6"><text:a xlink:type="simple" xlink:href="#__RefHeading___Toc630_3774095318" office:name="1.3 Вывод анализа" text:style-name="Index_20_Link" text:visited-style-name="Index_20_Link">1.3 Вывод анализа<text:tab/>9</text:a></text:p>
          <text:p text:style-name="P5"><text:a xlink:type="simple" xlink:href="#__RefHeading___Toc632_3774095318" office:name="2 Определение минимальных аппаратных требований к серверной платформе" text:style-name="Index_20_Link" text:visited-style-name="Index_20_Link">2 Определение минимальных аппаратных требований к серверной платформе<text:tab/>9</text:a></text:p>
          <text:p text:style-name="P6"><text:a xlink:type="simple" xlink:href="#__RefHeading___Toc634_3774095318" office:name="2.1 Факторы, определяющие аппаратные требования" text:style-name="Index_20_Link" text:visited-style-name="Index_20_Link">2.1 Факторы, определяющие аппаратные требования<text:tab/>9</text:a></text:p>
          <text:p text:style-name="P6"><text:a xlink:type="simple" xlink:href="#__RefHeading___Toc636_3774095318" office:name="2.2 Расчёт требований к оперативной памяти" text:style-name="Index_20_Link" text:visited-style-name="Index_20_Link">2.2 Расчёт требований к оперативной памяти<text:tab/>10</text:a></text:p>
          <text:p text:style-name="P6"><text:a xlink:type="simple" xlink:href="#__RefHeading___Toc1179_3774095318" office:name="2.3 Требования к процессору" text:style-name="Index_20_Link" text:visited-style-name="Index_20_Link">2.3 Требования к процессору<text:tab/>10</text:a></text:p>
          <text:p text:style-name="P6"><text:a xlink:type="simple" xlink:href="#__RefHeading___Toc1181_3774095318" office:name="2.4 Требования к дисковому пространству" text:style-name="Index_20_Link" text:visited-style-name="Index_20_Link">2.4 Требования к дисковому пространству<text:tab/>11</text:a></text:p>
          <text:p text:style-name="P6"><text:a xlink:type="simple" xlink:href="#__RefHeading___Toc1183_3774095318" office:name="2.5 Сетевые требования" text:style-name="Index_20_Link" text:visited-style-name="Index_20_Link">2.5 Сетевые требования<text:tab/>11</text:a></text:p>
          <text:p text:style-name="P6"><text:a xlink:type="simple" xlink:href="#__RefHeading___Toc1185_3774095318" office:name="2.6 Итоговые минимальные требования для курсовой работы" text:style-name="Index_20_Link" text:visited-style-name="Index_20_Link">2.6 Итоговые минимальные требования для курсовой работы<text:tab/>11</text:a></text:p>
          <text:p text:style-name="P5"><text:a xlink:type="simple" xlink:href="#__RefHeading___Toc4607_3774095318" office:name="3 РАЗРАБОТКА КОНФИГУРАЦИИ СЕРВЕРА" text:style-name="Index_20_Link" text:visited-style-name="Index_20_Link">3 РАЗРАБОТКА КОНФИГУРАЦИИ СЕРВЕРА<text:tab/>12</text:a></text:p>
          <text:p text:style-name="P6"><text:a xlink:type="simple" xlink:href="#__RefHeading___Toc4609_3774095318" office:name="3.1 Подготовка програмного окружения" text:style-name="Index_20_Link" text:visited-style-name="Index_20_Link">3.1 Подготовка програмного окружения<text:tab/>12</text:a></text:p>
          <text:p text:style-name="P6"><text:a xlink:type="simple" xlink:href="#__RefHeading___Toc4611_3774095318" office:name="3.2 Скрипт запуска сервера" text:style-name="Index_20_Link" text:visited-style-name="Index_20_Link">3.2 Скрипт запуска сервера<text:tab/>13</text:a></text:p>
          <text:p text:style-name="P6"><text:a xlink:type="simple" xlink:href="#__RefHeading___Toc4613_3774095318" office:name="3.3 Работа модели" text:style-name="Index_20_Link" text:visited-style-name="Index_20_Link">3.3 Работа модели<text:tab/>14</text:a></text:p>
          <text:p text:style-name="P5"><text:a xlink:type="simple" xlink:href="#__RefHeading___Toc6072_3774095318" office:name="4 РЕАЛИЗАЦИЯ ИНТЕГРАЦИИ ЛОКАЛЬНОГО LLM-СЕРВЕРА СО СРЕДОЙ РАЗРАБОТКИ CODE OSS" text:style-name="Index_20_Link" text:visited-style-name="Index_20_Link">4 РЕАЛИЗАЦИЯ ИНТЕГРАЦИИ ЛОКАЛЬНОГО LLM-СЕРВЕРА СО СРЕДОЙ РАЗРАБОТКИ CODE OSS<text:tab/>14</text:a></text:p>
          <text:p text:style-name="P6"><text:a xlink:type="simple" xlink:href="#__RefHeading___Toc6074_3774095318" office:name="4.1 Выбор инструмента интеграции: расширение Continue" text:style-name="Index_20_Link" text:visited-style-name="Index_20_Link">4.1 Выбор инструмента интеграции: расширение Continue<text:tab/>14</text:a></text:p>
          <text:p text:style-name="P6"><text:a xlink:type="simple" xlink:href="#__RefHeading___Toc6076_3774095318" office:name="4.2 Настройка подключения к локальному серверу" text:style-name="Index_20_Link" text:visited-style-name="Index_20_Link">4.2 Настройка подключения к локальному серверу<text:tab/>15</text:a></text:p>
          <text:p text:style-name="P6"><text:a xlink:type="simple" xlink:href="#__RefHeading___Toc6078_3774095318" office:name="4.3 Проверка работоспособности интеграции" text:style-name="Index_20_Link" text:visited-style-name="Index_20_Link">4.3 Проверка работоспособности интеграции<text:tab/>16</text:a></text:p>
          <text:p text:style-name="P6"><text:a xlink:type="simple" xlink:href="#__RefHeading___Toc581_1534057519" office:name="4.4 Выводы по интеграции" text:style-name="Index_20_Link" text:visited-style-name="Index_20_Link">4.4 Выводы по интеграции<text:tab/>18</text:a></text:p>
        </text:index-body>
      </text:table-of-content>
      <text:p text:style-name="P7" loext:marker-style-name="T2"/>
      <text:p text:style-name="P7" loext:marker-style-name="T2"/>
      <text:list text:continue-numbering="true" text:style-name="WWNum1">
        <text:list-item>
          <text:h text:style-name="P8" text:outline-level="1"><text:bookmark-start text:name="__RefHeading___Toc3200_3548392200"/>Термины и определения<text:bookmark-end text:name="__RefHeading___Toc3200_3548392200"/></text:h>
        </text:list-item>
      </text:list>
      <text:p text:style-name="P2"/>
      <text:p text:style-name="P2">В настоящей курсовой работе (проекте) применяют следующие термины с соответствующими определениями:</text:p>
      <text:p text:style-name="P9">API (Application Programming Interface) - программный интерфейс, то есть описание способов взаимодействия одной компьютерной программы с другими.</text:p>
      <text:p text:style-name="P9">AI - также ИИ, искусственный разум, в самом широком смысле — научно-технологическая область, занимающаяся изучением и созданием интеллектуальных сущностей.</text:p>
      <text:p text:style-name="P9">LLM (large language model) - <text:span text:style-name="T3">Большая языковая модель основанная на</text:span><text:bookmark text:name="mwCg"/><text:span text:style-name="T3"> нейроной сети с множеством параметров (миллиарды весовых коэффициентов и более), которая проходит предварительное обучение на обширных массивах неразмеченного</text:span><text:bookmark text:name="mwDw"/><text:span text:style-name="T3"> текста методами самообучения.</text:span></text:p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2" loext:marker-style-name="T3"><office:annotation loext:resolved="false"><dc:creator>&lt;анонимный&gt;</dc:creator><dc:date>2026-06-05T21:53:47</dc:date><text:p text:style-name="P3"><text:span text:style-name="T1">По алфавиту</text:span></text:p></office:annotation></text:p>
      <text:list text:continue-numbering="true" text:style-name="WWNum1">
        <text:list-item>
          <text:h text:style-name="P8" text:outline-level="1"><text:bookmark-start text:name="__RefHeading___Toc104_3548392200"/>Перечень сокращений и обозначений<text:bookmark-end text:name="__RefHeading___Toc104_3548392200"/></text:h>
        </text:list-item>
      </text:list>
      <text:p text:style-name="P2"/>
      <text:p text:style-name="P2">В настоящей курсовой работе (проекте) применяют следующие сокращения и обозначения:</text:p>
      <text:p text:style-name="P2"/>
      <text:list xml:id="list221828537601550" text:continue-numbering="true" text:style-name="WWNum1">
        <text:list-item>
          <text:h text:style-name="P8" text:outline-level="1"><text:bookmark-start text:name="__RefHeading___Toc4210_3548392200"/>Введение<text:bookmark-end text:name="__RefHeading___Toc4210_3548392200"/></text:h>
        </text:list-item>
      </text:list>
      <text:p text:style-name="P2">Современные IT-компании активно внедряют инструменты искусственного интеллекта в процессы разработки. Согласно <text:span text:style-name="T4">исследованию</text:span> Stack Overflow 2025 года, 84% разработчиков используют или планируют использовать AI-инструменты, при этом 51% применяют их ежедневно. <text:span text:style-name="T4">Исследование</text:span><office:annotation loext:resolved="false"><dc:creator>&lt;анонимный&gt;</dc:creator><dc:date>2026-06-05T21:54:18</dc:date><text:p text:style-name="P3"><text:span text:style-name="T1">Возможно 1 исслдования хватит </text:span></text:p></office:annotation><text:span text:style-name="T4"> C</text:span>omplexity Science Hub показывает, что доля AI-ассистированного кода на GitHub выросла с 5% в 2022 году до 29% к концу 2024 года.</text:p>
      <text:p text:style-name="P2">Однако рост популярности облачных AI-решений (GitHub Copilot, ChatGPT) обостряет проблему безопасности интеллектуальной собственности. Передача фрагментов кодовой базы сторонним серверам создаёт риски утечки конфиденциальных алгоритмов и коммерческой тайны. <text:span text:style-name="T4">Эксперты отмечают</text:span><office:annotation loext:resolved="false"><dc:creator>&lt;анонимный&gt;</dc:creator><dc:date>2026-06-05T21:54:07</dc:date><text:p text:style-name="P3"><text:span text:style-name="T1">Добавить ссылки на исследования</text:span></text:p></office:annotation><text:span text:style-name="T4">, </text:span>что при использовании облачных AI-инструментов возникают: размывание границ суверенитета данных, неконтролируемость цепочек вывода и расширение поверхности атаки. </text:p>
      <text:p text:style-name="P9">Актуальность работы определяется тремя факторами. Во-первых, необходимостью защиты кодовой базы: облачные AI-сервисы могут использовать переданный код для дообучения моделей, что создаёт риски раскрытия интеллектуальной собственности. Во-вторых, потребностью в автономности разработки при ограниченном доступе в Интернет или работе в закрытых периметрах. В-третьих, экономической целесообразностью: локальное развёртывание позволяет избежать регулярных абонентских платежей.</text:p>
      <text:p text:style-name="P2">Существует ряд open-source инструментов для локального запуска моделей (Ollama, llama.cpp, vLLM). Однако проблема системного подхода к интеграции такого сервера в реальную рабочую среду организации, с учётом требований администрирования и удобства для конечных пользователей, остаётся недостаточно проработанной.</text:p>
      <text:p text:style-name="P2"><text:soft-page-break/>Объект и предмет исследования:</text:p>
      <text:list text:style-name="WWNum2">
        <text:list-item>
          <text:list>
            <text:list-item>
              <text:p text:style-name="P11"><text:span text:style-name="Strong_20_Emphasis"><text:span text:style-name="T5">Объект исследования</text:span></text:span>: процесс организации безопасной локальной инфраструктуры для использования LLM в разработке ПО.</text:p>
            </text:list-item>
            <text:list-item>
              <text:p text:style-name="P11">Предмет исследования: методы развёртывания, администрирования и интеграции локального LLM-сервера (на базе llama-server) в рабочую среду IT-специалистов, в частности - подключение к Code OSS.</text:p>
            </text:list-item>
          </text:list>
        </text:list-item>
      </text:list>
      <text:p text:style-name="P9"><text:span text:style-name="Strong_20_Emphasis"><text:span text:style-name="T5">Цель работы: разработать и экспериментально подтвердить работоспособность локального LLM-сервера на базе llama-server, обеспечить его администрирование в условиях локальной сети и выполнить интеграцию со средой разработки Code OSS.</text:span></text:span></text:p>
      <text:p text:style-name="P9"><text:span text:style-name="Strong_20_Emphasis"><text:span text:style-name="T5">Задачи:</text:span></text:span><office:annotation loext:resolved="false"><dc:creator>&lt;анонимный&gt;</dc:creator><dc:date>2026-06-05T22:00:06</dc:date><text:p text:style-name="P3"><text:span text:style-name="T1">Куда то добавить мою конфигурацию</text:span></text:p></office:annotation></text:p>
      <text:list text:style-name="WWNum3">
        <text:list-item>
          <text:p text:style-name="P12">Провести анализ существующих решений для локального развёртывания LLM и обосновать выбор llama-server.</text:p>
        </text:list-item>
        <text:list-item>
          <text:p text:style-name="P12" loext:marker-style-name="T6"><text:span text:style-name="T4">Определить минимальные аппаратные требования и выполнить установку и настройку llama-server в локальной сети.</text:span><text:span text:style-name="T6"/></text:p>
        </text:list-item>
        <text:list-item>
          <text:p text:style-name="P12" loext:marker-style-name="T6"><text:span text:style-name="T4">Разработать конфигурацию сервера, обеспечивающую стабильную работу.</text:span><text:span text:style-name="T6"/></text:p>
        </text:list-item>
        <text:list-item>
          <text:p text:style-name="P12"><text:span text:style-name="T4">Реализовать интеграцию локального LLM-сервера с Code OSS на</text:span> клиентском компьютере.</text:p>
        </text:list-item>
        <text:list-item>
          <text:p text:style-name="P12">Выполнить экспериментальную проверку работоспособности решения .</text:p>
        </text:list-item>
        <text:list-item>
          <text:p text:style-name="P12" loext:marker-style-name="T6"><text:span text:style-name="T4">Сформулировать рекомендации по администрированию сервера .</text:span><office:annotation loext:resolved="false"><dc:creator>&lt;анонимный&gt;</dc:creator><dc:date>2026-06-06T02:31:37</dc:date><text:p text:style-name="P3"><text:span text:style-name="T1">Сделать краткое содержание </text:span></text:p></office:annotation></text:p>
        </text:list-item>
      </text:list>
      <text:h text:style-name="P13" text:outline-level="1"><text:span text:style-name="Strong_20_Emphasis"><text:span text:style-name="T7"/></text:span></text:h>
      <text:list text:continue-list="list221828537601550" text:style-name="WWNum1">
        <text:list-item>
          <text:h text:style-name="P14" text:outline-level="1"><text:bookmark-start text:name="__RefHeading___Toc866_2141837623"/><text:span text:style-name="Strong_20_Emphasis"><text:span text:style-name="T7">1 Анализ решений для локального развёртывания LLM и обоснование выбора llama.cpp</text:span></text:span><text:bookmark-end text:name="__RefHeading___Toc866_2141837623"/></text:h>
        </text:list-item>
      </text:list>
      <text:p text:style-name="P9" loext:marker-style-name="Strong Emphasis"><text:span text:style-name="Strong_20_Emphasis"/></text:p>
      <text:p text:style-name="P9"><text:span text:style-name="Strong_20_Emphasis"><text:span text:style-name="T5">Для организации локального LLM-сервера, доступного нескольким пользователям в корпоративной сети, наиболее актуальными являются два решения: Ollama и llama.cpp (с компонентом llama-server ). Оба инструмента базируются на ед</text:span></text:span><text:span text:style-name="Strong_20_Emphasis"><text:span text:style-name="T8">иной технологической основе (формат GGUF, оптимизации CPU/GPU), но принципиально различаются по архитектуре и подходу к администрированию.</text:span></text:span></text:p>
      <text:list xml:id="list221828329485421" text:continue-numbering="true" text:style-name="WWNum1">
        <text:list-item>
          <text:list>
            <text:list-item>
              <text:h text:style-name="P15" text:outline-level="2"><text:bookmark-start text:name="__RefHeading___Toc868_2141837623"/><text:span text:style-name="Strong_20_Emphasis"><text:span text:style-name="T9">1.1 Ollama</text:span></text:span><text:bookmark-end text:name="__RefHeading___Toc868_2141837623"/></text:h>
            </text:list-item>
          </text:list>
        </text:list-item>
      </text:list>
      <text:p text:style-name="P2" loext:marker-style-name="Strong Emphasis"><text:span text:style-name="Strong_20_Emphasis"/></text:p>
      <text:p text:style-name="P9"><text:span text:style-name="Strong_20_Emphasis"><text:span text:style-name="T5">Ollama</text:span></text:span><text:span text:style-name="Strong_20_Emphasis"><text:span text:style-name="T8"> позиционируется как «LLM-движок для разработчиков», предлагая максимально простой путь запуска моделей. Однако при использовании в многопользовательском сценарии проявляются его некоторые недостатки</text:span></text:span></text:p>
      <text:p text:style-name="P2"><text:span text:style-name="Strong_20_Emphasis"><text:span text:style-name="T8">Достоинства:</text:span></text:span></text:p>
      <text:list text:style-name="WWNum4">
        <text:list-item>
          <text:list>
            <text:list-item>
              <text:p text:style-name="P16"><text:span text:style-name="Strong_20_Emphasis"><text:span text:style-name="T5">Установка одной командой, готовые пакеты для всех ОС</text:span></text:span></text:p>
            </text:list-item>
            <text:list-item>
              <text:p text:style-name="P16"><text:span text:style-name="Strong_20_Emphasis"><text:span text:style-name="T5">Встроенный реестр моделей</text:span></text:span></text:p>
            </text:list-item>
            <text:list-item>
              <text:p text:style-name="P16"><text:span text:style-name="Strong_20_Emphasis"><text:span text:style-name="T5">Open-AI совместимый API</text:span></text:span></text:p>
            </text:list-item>
          </text:list>
        </text:list-item>
      </text:list>
      <text:p text:style-name="P2"><text:span text:style-name="Strong_20_Emphasis"><text:span text:style-name="T5">Недостатки:</text:span></text:span></text:p>
      <text:list text:style-name="WWNum5">
        <text:list-item>
          <text:list>
            <text:list-item>
              <text:p text:style-name="P17"><text:span text:style-name="Strong_20_Emphasis"><text:span text:style-name="T5">Последовательная обработка запросов — при одновременных обращениях нескольких пользователей запросы ствят в очередь </text:span></text:span></text:p>
            </text:list-item>
            <text:list-item>
              <text:p text:style-name="P17"><text:span text:style-name="Strong_20_Emphasis"><text:span text:style-name="T5">Ограниченный контроль над реурсами — администратор не может распределить потоки CPU между задачами </text:span></text:span></text:p>
            </text:list-item>
            <text:list-item>
              <text:p text:style-name="P17"><text:span text:style-name="Strong_20_Emphasis"><text:span text:style-name="T5">Отсутсвие встроенного веб-интерфейса </text:span></text:span></text:p>
            </text:list-item>
            <text:list-item>
              <text:p text:style-name="P17"><text:soft-page-break/><text:span text:style-name="Strong_20_Emphasis"><text:span text:style-name="T5">Логирование и мониторинг — стандартные средства логирования недостаточны для реальной эксплуатации </text:span></text:span></text:p>
            </text:list-item>
          </text:list>
        </text:list-item>
      </text:list>
      <text:p text:style-name="P18" loext:marker-style-name="T5"><text:span text:style-name="Strong_20_Emphasis"><text:span text:style-name="T5"/></text:span></text:p>
      <text:list xml:id="list221827938606675" text:continue-list="list221828329485421" text:style-name="WWNum1">
        <text:list-item>
          <text:list>
            <text:list-item>
              <text:h text:style-name="P15" text:outline-level="2"><text:bookmark-start text:name="__RefHeading___Toc735_118244425"/><text:span text:style-name="Strong_20_Emphasis"><text:span text:style-name="T7">1.2 Llama.cpp</text:span></text:span><text:bookmark-end text:name="__RefHeading___Toc735_118244425"/></text:h>
            </text:list-item>
          </text:list>
        </text:list-item>
      </text:list>
      <text:p text:style-name="P19" loext:marker-style-name="T5"><text:span text:style-name="Strong_20_Emphasis"><text:span text:style-name="T5"/></text:span></text:p>
      <text:p text:style-name="P9"><text:span text:style-name="Strong_20_Emphasis"><text:span text:style-name="T5">llama-server — это встроенный HTTP-сервер, входящий в состав проекта llama.cpp, предназначенный для production-развёртывания языковых моделей в корпоративной среде. В отличие от Ollama, который ориентирован на индивидуальных разработчиков и простоту использования, llama-server предоставляет администраторам организации полный спектр инструментов для управления многопользовательской инфраструктурой</text:span></text:span><text:span text:style-name="Strong_20_Emphasis">.</text:span></text:p>
      <text:p text:style-name="P2"><text:span text:style-name="Strong_20_Emphasis"><text:span text:style-name="T5">Достоинства:</text:span></text:span></text:p>
      <text:list text:style-name="WWNum6">
        <text:list-item>
          <text:list>
            <text:list-item>
              <text:p text:style-name="P20"><text:span text:style-name="Strong_20_Emphasis"><text:span text:style-name="T5">Параллельная обработка сессий</text:span></text:span><text:span text:style-name="Strong_20_Emphasis"><text:span text:style-name="T10"> — </text:span></text:span><text:span text:style-name="Strong_20_Emphasis"><text:span text:style-name="T5">поддержка конкурентных сессий с возможностью ограничения количества одновременных сессий </text:span></text:span></text:p>
            </text:list-item>
            <text:list-item>
              <text:p text:style-name="P20"><text:span text:style-name="Strong_20_Emphasis"><text:span text:style-name="T5">Полный контроль над ресурсами — управление количеством потоков CPU приоритетами, размером контекстного окна для каждого пользователя.</text:span></text:span></text:p>
            </text:list-item>
            <text:list-item>
              <text:p text:style-name="P20"><text:span text:style-name="Strong_20_Emphasis"><text:span text:style-name="T5">Встроенный веб-интерфейс позволяет наблюдать за работой сервера, просматривать историю запросов без дополнительных надстроек</text:span></text:span></text:p>
            </text:list-item>
            <text:list-item>
              <text:p text:style-name="P20"><text:span text:style-name="Strong_20_Emphasis"><text:span text:style-name="T5">Детальное логирование — все запросы и отеты логируются с возможностью нвстройки уровня детализации</text:span></text:span></text:p>
            </text:list-item>
            <text:list-item>
              <text:p text:style-name="P20"><text:span text:style-name="Strong_20_Emphasis"><text:span text:style-name="T5">Anthropic-совместимый API — расширяет возможности интеграции с различными клиентами.</text:span></text:span></text:p>
            </text:list-item>
          </text:list>
        </text:list-item>
      </text:list>
      <text:p text:style-name="P21" loext:marker-style-name="T5"><text:span text:style-name="Strong_20_Emphasis"><text:span text:style-name="T5"/></text:span></text:p>
      <text:list text:continue-list="list221827938606675" text:style-name="WWNum1">
        <text:list-item>
          <text:list>
            <text:list-item>
              <text:h text:style-name="P22" text:outline-level="2"><text:bookmark-start text:name="__RefHeading___Toc630_3774095318"/><text:span text:style-name="Strong_20_Emphasis"><text:span text:style-name="T7">1.3 Вывод анализа </text:span></text:span><text:bookmark-end text:name="__RefHeading___Toc630_3774095318"/></text:h>
            </text:list-item>
          </text:list>
        </text:list-item>
      </text:list>
      <text:p text:style-name="P23"><text:span text:style-name="Strong_20_Emphasis"><text:span text:style-name="T7"/></text:span></text:p>
      <text:p text:style-name="P2"><text:span text:style-name="Strong_20_Emphasis"><text:span text:style-name="T5">Ollama представляет собой удобное решение для индивидуального использования или малых групп разработчиков, где допустима последовательная обработка запросов. Однако в сценарии корпоративного локального LLM-сервера, обслуживающего нескольких пользователей одновременно, его архитектурные ограничения становятся критическими.</text:span></text:span></text:p>
      <text:p text:style-name="P2"><text:span text:style-name="Strong_20_Emphasis"><text:span text:style-name="T5">llama-server обеспечивает необходимый уровень контроля, масштабируемости и наблюдаемости, что делает его оптимальным выбором в качестве базового компонента для развёртывания локального LLM-сервера в организации. Более высокая сложность первичной настройки компенсируется гибкостью и предсказуемостью работы в многопользовательской среде.</text:span></text:span></text:p>
      <text:p text:style-name="P2" loext:marker-style-name="Strong Emphasis"><text:span text:style-name="Strong_20_Emphasis"/></text:p>
      <text:h text:style-name="P13" text:outline-level="1"><text:span text:style-name="Strong_20_Emphasis"><text:span text:style-name="T7"/></text:span></text:h>
      <text:list text:continue-numbering="true" text:style-name="WWNum1">
        <text:list-item>
          <text:h text:style-name="P14" text:outline-level="1"><text:bookmark-start text:name="__RefHeading___Toc632_3774095318"/><text:span text:style-name="Strong_20_Emphasis"><text:span text:style-name="T7">2 Определение минимальных аппаратных требований к серверной платформе</text:span></text:span><text:bookmark-end text:name="__RefHeading___Toc632_3774095318"/></text:h>
        </text:list-item>
      </text:list>
      <text:p text:style-name="P24" loext:marker-style-name="T11"><text:span text:style-name="Strong_20_Emphasis"><text:span text:style-name="T11"/></text:span></text:p>
      <text:p text:style-name="P9"><text:span text:style-name="Strong_20_Emphasis"><text:span text:style-name="T5">Для успешного развёртывания локального LLM-сервера на базе llama.cpp необходимо определить минимальные аппаратные требования, обеспечивающие стабильную работу в многопользовательской среде. В отличие от индивидуального использования, где допустимы периодические задержки, серверная инфраструктура организации должна гарантировать предсказуемое время отклика при одновременной работе нескольких пользователей.</text:span></text:span></text:p>
      <text:list xml:id="list221828633657134" text:continue-numbering="true" text:style-name="WWNum1">
        <text:list-item>
          <text:list>
            <text:list-item>
              <text:h text:style-name="P15" text:outline-level="2"><text:bookmark-start text:name="__RefHeading___Toc634_3774095318"/><text:span text:style-name="Strong_20_Emphasis"><text:span text:style-name="T7">2.1 Факторы, определяющие аппаратные требования</text:span></text:span><text:bookmark-end text:name="__RefHeading___Toc634_3774095318"/></text:h>
            </text:list-item>
          </text:list>
        </text:list-item>
      </text:list>
      <text:p text:style-name="P25"><text:span text:style-name="Strong_20_Emphasis"><text:span text:style-name="T7"/></text:span></text:p>
      <text:p text:style-name="P9"><text:span text:style-name="Strong_20_Emphasis"><text:span text:style-name="T5">Аппаратные требования к LLM-серверу определяются тремя основными группами факторов:</text:span></text:span></text:p>
      <text:p text:style-name="P19" loext:marker-style-name="T5"><text:span text:style-name="Strong_20_Emphasis"><text:span text:style-name="T5"/></text:span></text:p>
      <text:list text:style-name="WWNum7">
        <text:list-item>
          <text:list>
            <text:list-item>
              <text:p text:style-name="P26"><text:span text:style-name="Strong_20_Emphasis"><text:span text:style-name="T5">Характерискика модели — о</text:span></text:span><text:span text:style-name="Strong_20_Emphasis"><text:span text:style-name="T8">сновной объём потребляемой памяти зависит от выбранной модели и типа квантования. Однако при загрузке в оперативную память требуется дополнительное пространство для KV-кэша, размер которого пропорционален контекстному окну.</text:span></text:span></text:p>
            </text:list-item>
            <text:list-item>
              <text:p text:style-name="P26"><text:span text:style-name="Strong_20_Emphasis"><text:span text:style-name="T8">Многопользовательская нагрузка. При параллельной обработке запросов от нескольких пользователей требования к памяти, GPU и CPU возрастают пропорционально количеству одновременных сессий. Каждый параллельный слот требует выделения</text:span></text:span><text:span text:style-name="Strong_20_Emphasis"><text:span text:style-name="T5"> собственного KV-кэша </text:span></text:span></text:p>
            </text:list-item>
            <text:list-item>
              <text:p text:style-name="P26"><text:span text:style-name="Strong_20_Emphasis"><text:span text:style-name="T5">Размер контекстного окна. Увеличение контекстного окна существенно повышает потребление памяти.</text:span></text:span></text:p>
            </text:list-item>
          </text:list>
        </text:list-item>
      </text:list>
      <text:list text:continue-list="list221828633657134" text:style-name="WWNum1">
        <text:list-item>
          <text:list>
            <text:list-item>
              <text:h text:style-name="P15" text:outline-level="2"><text:bookmark-start text:name="__RefHeading___Toc636_3774095318"/><text:soft-page-break/><text:span text:style-name="Strong_20_Emphasis"><text:span text:style-name="T7">2.2 Расчёт требований к оперативной памяти</text:span></text:span><text:bookmark-end text:name="__RefHeading___Toc636_3774095318"/></text:h>
            </text:list-item>
          </text:list>
        </text:list-item>
      </text:list>
      <text:p text:style-name="P25"><text:span text:style-name="Strong_20_Emphasis"><text:span text:style-name="T7"/></text:span></text:p>
      <text:p text:style-name="P9"><text:span text:style-name="Strong_20_Emphasis"><text:span text:style-name="T8">Общий объём оперативной памяти для llama-server можно рассчитать по формуле 1:</text:span></text:span></text:p>
      <text:p text:style-name="P2" loext:marker-style-name="T6"><text:span text:style-name="T4">RAM_total = Model_size_loaded + KV_cache_size × N_parallel_slots + Overhead</text:span><office:annotation loext:resolved="false"><dc:creator>&lt;анонимный&gt;</dc:creator><dc:date>2026-06-05T22:01:23</dc:date><text:p text:style-name="P3"><text:span text:style-name="T1">Норм формулу сделать </text:span></text:p></office:annotation></text:p>
      <text:p text:style-name="P2" loext:marker-style-name="T6"><text:span text:style-name="T4">Согласно документации llama.cpp, для базового запуска достаточно 4 ГБ ОЗУ</text:span><text:span text:style-name="T6"/></text:p>
      <text:list text:continue-numbering="true" text:style-name="WWNum1">
        <text:list-item>
          <text:list>
            <text:list-item>
              <text:h text:style-name="P27" text:outline-level="2" loext:marker-style-name="T6"><text:bookmark-start text:name="__RefHeading___Toc1179_3774095318"/>2.3 Требования к процессору<text:bookmark-end text:name="__RefHeading___Toc1179_3774095318"/></text:h>
            </text:list-item>
          </text:list>
        </text:list-item>
      </text:list>
      <text:p text:style-name="P28" loext:marker-style-name="T6"/>
      <text:p text:style-name="P2">llama.cpp эффективно работает как на x86_64, так и на AArch64 <office:annotation loext:resolved="false"><dc:creator>&lt;анонимный&gt;</dc:creator><dc:date>2026-06-05T22:02:38</dc:date><text:p text:style-name="P3"><text:span text:style-name="T1">Добавить определение архитектур</text:span></text:p></office:annotation>архитектурах.</text:p>
      <text:p text:style-name="P2">Для многопользовательских сценариев на 32-ядерных серверах рекомендуется использовать CPU affinity и NUMA-aware оптимизации . При использовании GPU достаточно 2-4 ядер CPU для управления передачей данных.<office:annotation loext:resolved="false"><dc:creator>&lt;анонимный&gt;</dc:creator><dc:date>2026-06-05T22:03:41</dc:date><text:p text:style-name="P3"><text:span text:style-name="T1">Из-за специфики работы llama с потоками процессора</text:span></text:p></office:annotation></text:p>
      <text:list xml:id="list221828815412143" text:continue-numbering="true" text:style-name="WWNum1">
        <text:list-item>
          <text:list>
            <text:list-item>
              <text:h text:style-name="P15" text:outline-level="2"><text:bookmark-start text:name="__RefHeading___Toc1181_3774095318"/>2.4 Требования к дисковому пространству<text:bookmark-end text:name="__RefHeading___Toc1181_3774095318"/></text:h>
            </text:list-item>
          </text:list>
        </text:list-item>
      </text:list>
      <text:p text:style-name="P25"/>
      <text:p text:style-name="P2">Дисковое пространство необходимо для хранения файлов моделей и логов сервера:</text:p>
      <text:list text:style-name="WWNum8">
        <text:list-item>
          <text:list>
            <text:list-item>
              <text:p text:style-name="P29">Модель, вес зависит от кол-ва параметров</text:p>
            </text:list-item>
            <text:list-item>
              <text:p text:style-name="P29">Логирование: лучше выделить 5-10 ГБ для хронологических логов</text:p>
            </text:list-item>
            <text:list-item>
              <text:p text:style-name="P29">Сиситемные требования ОС: 20 - 40 ГБ</text:p>
            </text:list-item>
          </text:list>
        </text:list-item>
      </text:list>
      <text:p text:style-name="P30">Рекомендуемый обьем: от 32ГБ + вес модели.</text:p>
      <text:list text:continue-list="list221828815412143" text:style-name="WWNum1">
        <text:list-item>
          <text:list>
            <text:list-item>
              <text:h text:style-name="P15" text:outline-level="2"><text:bookmark-start text:name="__RefHeading___Toc1183_3774095318"/><text:soft-page-break/>2.5 Сетевые требования<text:bookmark-end text:name="__RefHeading___Toc1183_3774095318"/></text:h>
            </text:list-item>
          </text:list>
        </text:list-item>
      </text:list>
      <text:p text:style-name="P25"/>
      <text:p text:style-name="P2" loext:marker-style-name="T5"><text:span text:style-name="T5">Для работы в локальной сети организации серьезных требований нет. Пропускная способнойсть от 100 Мбит/с — этого достаточно для передачи текстовых данных. Для упрощения настройки рекомендуется статический IP адресс. Сервер привязывается к порту (по умолчанию 8080) и интерфейсу 0.0.0.0 для обеспечения доступности из сети.</text:span><text:span text:style-name="T5"/></text:p>
      <text:list text:continue-numbering="true" text:style-name="WWNum1">
        <text:list-item>
          <text:list>
            <text:list-item>
              <text:h text:style-name="P15" text:outline-level="2"><text:bookmark-start text:name="__RefHeading___Toc1185_3774095318"/>2.6 Итоговые минимальные требования для курсовой работы<text:bookmark-end text:name="__RefHeading___Toc1185_3774095318"/></text:h>
            </text:list-item>
          </text:list>
        </text:list-item>
      </text:list>
      <text:p text:style-name="P25"/>
      <text:p text:style-name="P2">Для личного эксперимента я принял решение развернуть локальный LLM-сервер на старом, вышедшем из активной эксплуатации ноутбуке. Это необходимо для получения реального опыта администрирования физичекого сервера и интеграции его в рабочую среду. Также Запуск LLM-модели на заведомо слабом устройстве доказывает, что современные языковые модели не требуют дорогостоящих серверов или облачных GPU. Технология становится доступной даже для малых организаций с ограниченным бюджетом.</text:p>
      <text:p text:style-name="P2">Для успешной работы на старом ноутбуке была выбрана модель Qwen3-0.6B в квантованном<office:annotation loext:resolved="false"><dc:creator>&lt;анонимный&gt;</dc:creator><dc:date>2026-06-05T23:02:31</dc:date><text:p text:style-name="P3"><text:span text:style-name="T1">Дать определение квантования</text:span></text:p></office:annotation> формате Q4_0 (размер файла ~469 МБ). Данная модел имеет всего 0,6 млрд параметров,что минимизирует потребелние ОЗУ.</text:p>
      <text:p text:style-name="P2">Важно понимать, что данная аппаратная платформа не рассчитана на работу в реальной рабочей среде. Но для целей курсовой работы — демонстрации принципиальной возможности создания локального LLM-сервера с нуля, его администрирования и интеграции в рабочую среду организации — данная платформа показательна.</text:p>
      <text:h text:style-name="P13" text:outline-level="1"/>
      <text:list text:continue-numbering="true" text:style-name="WWNum1">
        <text:list-item>
          <text:h text:style-name="P14" text:outline-level="1"><text:bookmark-start text:name="__RefHeading___Toc4607_3774095318"/>3 РАЗРАБОТКА КОНФИГУРАЦИИ СЕРВЕРА<text:bookmark-end text:name="__RefHeading___Toc4607_3774095318"/></text:h>
        </text:list-item>
      </text:list>
      <text:p text:style-name="P2"/>
      <text:p text:style-name="P2">В качестве серверной платформы использовался легковесный дистрибутив antiX Linux, основанный на Debian, но принципиально не использующий systemd. Это накладывало определённые ограничения на стандартные способы управления сервисами, но одновременно демонстрировало гибкость подхода: для работы llama-server не требуется какая-либо специфическая система инициализации — достаточно shell-скрипта и возможности запуска фонового процесса.</text:p>
      <text:list text:continue-numbering="true" text:style-name="WWNum1">
        <text:list-item>
          <text:list>
            <text:list-item>
              <text:h text:style-name="P15" text:outline-level="2"><text:bookmark-start text:name="__RefHeading___Toc4609_3774095318"/>3.1 Подготовка програмного окружения<text:bookmark-end text:name="__RefHeading___Toc4609_3774095318"/></text:h>
            </text:list-item>
          </text:list>
        </text:list-item>
      </text:list>
      <text:p text:style-name="P25"/>
      <text:p text:style-name="P2">На старый ноутбук была установлена antiX — дистрибутив, известный своей эффективной работой на устаревшем оборудовании<office:annotation loext:resolved="false"><dc:creator>&lt;анонимный&gt;</dc:creator><dc:date>2026-06-06T01:43:53</dc:date><text:p text:style-name="P3"><text:span text:style-name="T1">Сайт с минималками </text:span></text:p></office:annotation>. Выбор antiX обусловлен минимальным потреблением ресурсов (оперативная память после загрузки составляет менее 200 МБ), что оставляет максимум свободной памяти для загрузки LLM-модели.</text:p>
      <text:p text:style-name="P2">Llama.cpp собирается из исходного кода, из репозитория проекта на GitHub. Компиляция производилась прямо на ноутбуке при помощи CMake, что делает исполняемые файлы оптимизироваными для конкректного процессора.</text:p>
      <text:p text:style-name="P2">Для работы на ограниченном оборудовании была выбрана квантованная модель Qwen3-0.6B в формате GGUF с квантованием Q4_0. Выбор модели определялся её малым размером (~469 МБ) и при этом достаточным качеством ответов на русском языке. Модель была размещена в отдельной директории для удобства работы.</text:p>
      <text:list text:continue-numbering="true" text:style-name="WWNum1">
        <text:list-item>
          <text:list>
            <text:list-item>
              <text:h text:style-name="P15" text:outline-level="2"><text:bookmark-start text:name="__RefHeading___Toc4611_3774095318"/>3.2 Скрипт запуска сервера <text:bookmark-end text:name="__RefHeading___Toc4611_3774095318"/></text:h>
            </text:list-item>
          </text:list>
        </text:list-item>
      </text:list>
      <text:p text:style-name="P25"/>
      <text:p text:style-name="P2"><text:soft-page-break/>Поскольку antiX не использует systemd, стандартные механизмы<office:annotation loext:resolved="false"><dc:creator>&lt;анонимный&gt;</dc:creator><dc:date>2026-06-06T03:02:15</dc:date><text:p text:style-name="P3"><text:span text:style-name="T1">Нужно поставить систему с systemd и все переделать </text:span></text:p></office:annotation> создания systemd-сервисов (файлы .service) неприменимы. Вместо этого был разработан bash-скрипт, реализующий запуск llama-server в фоновом режиме.</text:p>
      <text:p text:style-name="P2">Bash скрипт:</text:p>
      <text:p text:style-name="P2">#!/bin/bash</text:p>
      <text:p text:style-name="P2"># Путь к модели и параметры</text:p>
      <text:p text:style-name="P2">MODEL_PATH="/home/chitak/models/qwen3-0.6b-q4_0.gguf"</text:p>
      <text:p text:style-name="P2">HOST="0.0.0.0"</text:p>
      <text:p text:style-name="P2">PORT="3000"</text:p>
      <text:p text:style-name="P2"/>
      <text:p text:style-name="P2"># Запуск сервера, лог</text:p>
      <text:p text:style-name="P2">nohup /home/chitak/llama.cpp/build/bin/llama-server -m $MODEL_PATH --<text:tab/>host $HOST --port $PORT -c 8192 -np 4 --parallel 2 &gt;&gt; /var/log/llama.log <text:tab/>2&gt;&amp;1 &amp;</text:p>
      <text:p text:style-name="P2">echo "Сервер запущен с PID: $!"</text:p>
      <text:p text:style-name="P2"/>
      <text:p text:style-name="P2" loext:marker-style-name="T6"><text:span text:style-name="T4">Параметр «-c 8192» был выбран как компромиссное значение: для многих задач (автодополнение кода, ответы на вопросы по небольшому фрагменту кода) контекста в 8192 токена достаточно. Параметр «--parallel 2» позволяет серверу обрабатывать до двух запросов одновременно, что критически важно при интеграции с несколькими клиентами в локальной сети.</text:span><text:span text:style-name="T6"/></text:p>
      <text:list text:continue-numbering="true" text:style-name="WWNum1">
        <text:list-item>
          <text:list>
            <text:list-item>
              <text:h text:style-name="P15" text:outline-level="2"><text:bookmark-start text:name="__RefHeading___Toc4613_3774095318"/>3.3 Работа модели<text:bookmark-end text:name="__RefHeading___Toc4613_3774095318"/></text:h>
            </text:list-item>
          </text:list>
        </text:list-item>
      </text:list>
      <text:p text:style-name="P25"/>
      <text:p text:style-name="P2"><text:soft-page-break/>Для проверки работоспособности модели я с другого компьютера в локальной сети, открыл в браузере веб интерфейс llama-srver по адресу «hhtp://192.168.1.117:3000». В чате с моделью протестировал максимально простой тестовый промт «hello», показал на рисунке <text:bookmark-ref text:reference-format="text" text:ref-name="Ref_Рисунок1_number_only">1</text:bookmark-ref></text:p>
      <text:p text:style-name="P2">Модель успешно дала ответ на запрос, что свидетельствует о правильной работе llama-server.<draw:custom-shape text:anchor-type="char" draw:z-index="0" draw:name="Врезка2" draw:style-name="gr1" draw:text-style-name="P32" svg:width="16.502cm" svg:height="13.239cm" svg:x="-0.002cm" svg:y="0.002cm"><text:p text:style-name="P31"><draw:frame draw:style-name="fr1" draw:name="Изображение2" text:anchor-type="as-char" svg:width="16.501cm" svg:height="12.539cm" draw:z-index="4"><draw:image xlink:href="Pictures/10000001000003E8000002F82C0B3B17.png" xlink:type="simple" xlink:show="embed" xlink:actuate="onLoad" draw:mime-type="image/png"/></draw:frame>Рисунок <text:bookmark-start text:name="Ref_Рисунок1_number_only"/><text:sequence text:ref-name="refDrawing0" text:name="Drawing" text:formula="ooow:Drawing+1" style:num-format="1">1</text:sequence><text:bookmark-end text:name="Ref_Рисунок1_number_only"/>: Модель отвечает на запрос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13" text:outline-level="1"/>
      <text:list text:continue-numbering="true" text:style-name="WWNum1">
        <text:list-item>
          <text:h text:style-name="P14" text:outline-level="1"><text:bookmark-start text:name="__RefHeading___Toc6072_3774095318"/>4 РЕАЛИЗАЦИЯ ИНТЕГРАЦИИ ЛОКАЛЬНОГО LLM-СЕРВЕРА СО СРЕДОЙ РАЗРАБОТКИ CODE OSS<text:bookmark-end text:name="__RefHeading___Toc6072_3774095318"/></text:h>
          <text:list>
            <text:list-item>
              <text:h text:style-name="P15" text:outline-level="2"><text:bookmark-start text:name="__RefHeading___Toc6074_3774095318"/>4.1 Выбор инструмента интеграции: расширение Continue<text:bookmark-end text:name="__RefHeading___Toc6074_3774095318"/></text:h>
            </text:list-item>
          </text:list>
        </text:list-item>
      </text:list>
      <text:p text:style-name="P25"/>
      <text:p text:style-name="P2" loext:marker-style-name="T5"><text:span text:style-name="T5">Для интеграции разработанного локального LLM-сервера в среду разработки был выбран инструмент Continue — открытое расширение (плагин) для Visual Studio Code и его форков, включая Code OSS. Continue позиционируется как AI-ассистент для разработчиков, поддерживающий подключение к различным моделям, включая локальные</text:span><text:span text:style-name="T5"/></text:p>
      <text:p text:style-name="P2" loext:marker-style-name="T5"><text:span text:style-name="T5">Важно отметить, что Continue доступен не только в официальном Visual Studio Code от Microsoft, но и в Code OSS — полностью открытой версии редактора, распространяемой под лицензией MIT. Это позволяет использовать расширение в среде разработки, где приоритетом является полная открытость и отсутствие телеметрии Microsoft.</text:span><text:span text:style-name="T5"/></text:p>
      <text:list text:continue-numbering="true" text:style-name="WWNum1">
        <text:list-item>
          <text:list>
            <text:list-item>
              <text:h text:style-name="P15" text:outline-level="2"><text:bookmark-start text:name="__RefHeading___Toc6076_3774095318"/>4.2 Настройка подключения к локальному серверу<text:bookmark-end text:name="__RefHeading___Toc6076_3774095318"/></text:h>
            </text:list-item>
          </text:list>
        </text:list-item>
      </text:list>
      <text:p text:style-name="P25"/>
      <text:p text:style-name="P2">Continue использует конфигурационный файл в формате YAML, который по умолчанию находится в директории ~/.continue/config.yaml (в Linux-системах). Для подключения к локальному серверу на базе llama.cpp была создана следующая конфигурация:</text:p>
      <text:p text:style-name="P2">name: Local Config</text:p>
      <text:p text:style-name="P2">version: 1.0.0</text:p>
      <text:p text:style-name="P2">schema: v1</text:p>
      <text:p text:style-name="P2">models:</text:p>
      <text:p text:style-name="P2"><text:tab/>-<text:tab/>name: Local llama-server</text:p>
      <text:p text:style-name="P2"><text:tab/><text:tab/>provider: llama.cpp</text:p>
      <text:p text:style-name="P2"><text:soft-page-break/><text:tab/><text:tab/>model: qwen3-0.6b-q4_0.gguf</text:p>
      <text:p text:style-name="P2"><text:tab/><text:tab/>apiBase: http://192.168.1.117:3000</text:p>
      <text:p text:style-name="P2"><text:tab/><text:tab/>contextLength: 8192</text:p>
      <text:p text:style-name="P2"><text:tab/><text:tab/><text:tab/>roles:</text:p>
      <text:p text:style-name="P2"><text:tab/><text:tab/><text:tab/>- chat</text:p>
      <text:p text:style-name="P2"><text:tab/><text:tab/><text:tab/>- edit</text:p>
      <text:p text:style-name="P2"><text:tab/><text:tab/><text:tab/>- apply</text:p>
      <text:p text:style-name="P2">tabAutocompleteModel:</text:p>
      <text:p text:style-name="P2"><text:tab/>provider: llama.cpp</text:p>
      <text:p text:style-name="P2"><text:tab/>model: qwen3-0.6b-q4_0.gguf</text:p>
      <text:p text:style-name="P2"><text:tab/>apiBase: http://192.168.1.117:3000</text:p>
      <text:p text:style-name="P2"><text:tab/>contextLength: 4096</text:p>
      <text:p text:style-name="P2">allowAnonymousTelemetry: false</text:p>
      <text:list text:continue-numbering="true" text:style-name="WWNum1">
        <text:list-item>
          <text:list>
            <text:list-item>
              <text:h text:style-name="P15" text:outline-level="2"><text:bookmark-start text:name="__RefHeading___Toc6078_3774095318"/>4.3 Проверка работоспособности интеграции<text:bookmark-end text:name="__RefHeading___Toc6078_3774095318"/></text:h>
            </text:list-item>
          </text:list>
        </text:list-item>
      </text:list>
      <text:p text:style-name="P25"/>
      <text:p text:style-name="P2">После сохранения конфигурации и перезагрузки Code OSS расширение Continue установило соединение с llama-server. Успешность подключения подтверждалась появлением имени модели «Local llama-server» в интерфейсе Continue (нижняя панель чата).</text:p>
      <text:p text:style-name="P2"><text:soft-page-break/>Для проверки качества работы модели был отправлен простой запрос: «write a hello world program». Резултат на рисунке <text:bookmark-ref text:reference-format="text" text:ref-name="Ref_Рисунок0_number_only">2</text:bookmark-ref>.<draw:custom-shape text:anchor-type="char" draw:z-index="1" draw:name="Врезка1" draw:style-name="gr2" draw:text-style-name="P32" svg:width="12.773cm" svg:height="12.083cm" svg:x="1.192cm" svg:y="2.277cm"><text:p text:style-name="P31"><draw:frame draw:style-name="fr1" draw:name="Изображение1" text:anchor-type="as-char" svg:width="12.772cm" svg:height="11.384cm" draw:z-index="7"><draw:image xlink:href="Pictures/10000001000002AA000002602A4C232F.png" xlink:type="simple" xlink:show="embed" xlink:actuate="onLoad" draw:mime-type="image/png"/></draw:frame>Рисунок <text:bookmark-start text:name="Ref_Рисунок0_number_only"/><text:sequence text:ref-name="refDrawing1" text:name="Drawing" text:formula="ooow:Drawing+1" style:num-format="1">2</text:sequence><text:bookmark-end text:name="Ref_Рисунок0_number_only"/>: Галлюцинации модели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33">В данном тесте произошла галюцинация, модель начинает генерировать множественные повторяющиеся директивы #include</text:p>
      <text:p text:style-name="P2">Следующий тест с другим запросом: «write test program» оказался более успешным. В резултате был получен код. Рисунок <text:bookmark-ref text:reference-format="text" text:ref-name="Ref_Рисунок2_number_only">3</text:bookmark-ref>.</text:p>
      <text:p text:style-name="P2">Код успешно компилируется и результатор работы программы является вывод в консоль: «Case 1 is true.»<draw:custom-shape text:anchor-type="char" draw:z-index="3" draw:name="Врезка3" draw:style-name="gr3" draw:text-style-name="P32" svg:width="16.502cm" svg:height="18.472cm" svg:x="-0.002cm" svg:y="0.002cm"><text:p text:style-name="P31"><draw:frame draw:style-name="fr1" draw:name="Изображение3" text:anchor-type="as-char" svg:width="16.501cm" svg:height="17.773cm" draw:z-index="8"><draw:image xlink:href="Pictures/10000001000003C00000040A59F619E5.png" xlink:type="simple" xlink:show="embed" xlink:actuate="onLoad" draw:mime-type="image/png"/></draw:frame>Рисунок <text:bookmark-start text:name="Ref_Рисунок2_number_only"/><text:sequence text:ref-name="refDrawing2" text:name="Drawing" text:formula="ooow:Drawing+1" style:num-format="1">3</text:sequence><text:bookmark-end text:name="Ref_Рисунок2_number_only"/>: Сгенерированный код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text:continue-numbering="true" text:style-name="WWNum1">
        <text:list-item>
          <text:list>
            <text:list-item>
              <text:h text:style-name="P15" text:outline-level="2"><text:bookmark-start text:name="__RefHeading___Toc581_1534057519"/><text:soft-page-break/>4.4 Выводы по интеграции<text:bookmark-end text:name="__RefHeading___Toc581_1534057519"/></text:h>
            </text:list-item>
          </text:list>
        </text:list-item>
      </text:list>
      <text:p text:style-name="P25"/>
      <text:p text:style-name="P2">Интеграция локального LLM-сервера с Code OSS через расширение Continue была успешно реализована на уровне подключения: клиент (Code OSS) установил соединение с сервером (llama-server) в локальной сети и смог отправлять запросы на генерацию. Однако практическая полезность решения оказалась ограниченной из-за качества работы выбранной модели Qwen3-0.6B-Q4_0, которая на простых задачах демонстрировала галлюцинации и избыточную генерацию.</text:p>
      <text:p text:style-name="P34">Данный результат, тем не менее, имеет ценность: он демонстрирует принципиальную достижимость цели — локальный LLM-сервер может быть интегрирован в среду разработки, заменяя облачные решения. Для повышения качества генерации потребуется использование более крупных моделей (например, Qwen2.5-Coder-7B или DeepSeek-Coder-6.7B), что, в свою очередь, потребует более мощного серверного оборудовани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" style:font-family-asian="'Noto Sans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family="'Times new roman'" style:font-family-generic="roman" style:font-pitch="variable" fo:font-size="14pt" style:font-size-asian="14pt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Заголовок" style:next-style-name="Text_20_body" style:default-outline-level="1" style:list-style-name="WWNum1" style:list-level="1" style:class="chapter">
      <style:paragraph-properties fo:margin-top="0cm" fo:margin-bottom="0cm" style:contextual-spacing="false" fo:line-height="100%" fo:text-align="center" style:justify-single-word="false" style:snap-to-layout-grid="false"/>
      <style:text-properties fo:text-transform="uppercase" style:font-name="Times new roman" fo:font-family="'Times new roman'" style:font-family-generic="roman" style:font-pitch="variable" fo:font-size="14pt" fo:font-weight="bold" style:font-size-asian="14pt" style:font-weight-asian="bold" style:font-size-complex="18pt" style:font-weight-complex="bold"/>
    </style:style>
    <style:style style:name="Heading_20_2" style:display-name="Heading 2" style:family="paragraph" style:parent-style-name="Заголовок" style:next-style-name="Text_20_body" style:default-outline-level="2" style:list-style-name="WWNum1" style:list-level="2" style:class="chapter">
      <style:paragraph-properties fo:margin-top="0.353cm" fo:margin-bottom="0.212cm" style:contextual-spacing="false" fo:text-indent="1.251cm" style:auto-text-indent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6pt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Колонтитулы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Колонтитулы" style:class="extra">
      <style:paragraph-properties text:number-lines="false" text:line-number="0"/>
    </style:style>
    <style:style style:name="Index_20_Heading" style:display-name="Index Heading" style:family="paragraph" style:parent-style-name="Заголовок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Указатель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size-asian="14pt"/>
    </style:style>
    <style:style style:name="Contents_20_2" style:display-name="Contents 2" style:family="paragraph" style:parent-style-name="Указатель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size-asian="14pt"/>
    </style:style>
    <style:style style:name="Содержимое_20_врезки" style:display-name="Содержимое врезки" style:family="paragraph" style:parent-style-name="Standard"/>
    <style:style style:name="Title" style:family="paragraph" style:parent-style-name="Заголовок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Текст_20_в_20_заданном_20_формате" style:display-name="Текст в заданном формате" style:family="paragraph" style:parent-style-name="Standard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Комментарий" style:family="paragraph" style:parent-style-name="Standard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Фигура" style:family="paragraph" style:parent-style-name="Caption"/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Ссылка_20_указателя" style:display-name="Ссылка указателя" style:family="text"/>
    <style:style style:name="Символ_20_нумерации" style:display-name="Символ нумерации" style:family="text"/>
    <style:style style:name="Маркеры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Исходный_20_текст" style:display-name="Исходный текст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officeooo:paragraph-rsid="001ebf59"/>
    </style:style>
    <style:page-layout style:name="Mpm1">
      <style:page-layout-properties fo:page-width="21.001cm" fo:page-height="29.7cm" style:num-format="1" style:print-orientation="portrait" fo:margin-top="1.499cm" fo:margin-bottom="2.499cm" fo:margin-left="3cm" fo:margin-right="1.499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1"/><text:page-number text:select-page="current">20</text:page-number><text:bookmark-end text:name="PageNumWizard_HEADER_Базовый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7:36:50</meta:creation-date>
    <dc:language>ru-RU</dc:language>
    <meta:print-date>2026-06-06T03:37:11</meta:print-date>
    <dc:date>2026-06-21T22:18:27.696443401</dc:date>
    <meta:editing-cycles>33</meta:editing-cycles>
    <meta:editing-duration>P1DT8H50M40S</meta:editing-duration>
    <meta:generator>LibreOffice/25.8.7.3$Linux_X86_64 LibreOffice_project/580$Build-3</meta:generator>
    <meta:document-statistic meta:table-count="0" meta:image-count="3" meta:object-count="0" meta:page-count="20" meta:paragraph-count="163" meta:word-count="2014" meta:character-count="16486" meta:non-whitespace-character-count="14609"/>
    <meta:user-defined meta:name="AppVersion">15.0000</meta:user-defined>
  </office:meta>
</office:document-meta>
</file>