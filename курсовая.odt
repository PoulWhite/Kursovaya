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149F8E2F9B8.png" manifest:media-type="image/png"/>
  <manifest:file-entry manifest:full-path="Pictures/10000001000003340000031669205A5B.png" manifest:media-type="image/png"/>
  <manifest:file-entry manifest:full-path="Pictures/100000010000025B000001D6A176FB4A.png" manifest:media-type="image/png"/>
  <manifest:file-entry manifest:full-path="Pictures/10000001000003620000031EF8BE9D40.png" manifest:media-type="image/png"/>
  <manifest:file-entry manifest:full-path="Pictures/100000010000028D00000243114045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margin-left="0cm" fo:text-indent="0cm" style:auto-text-indent="false"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4" style:family="paragraph" style:parent-style-name="Heading_20_1" style:list-style-name="WWNum1">
      <style:paragraph-properties fo:margin-left="0cm" fo:margin-top="0cm" fo:margin-bottom="0cm" style:contextual-spacing="false" fo:text-align="center" style:justify-single-word="false" fo:text-indent="0cm" style:auto-text-indent="false" fo:break-before="page" style:writing-mode="lr-tb"/>
    </style:style>
    <style:style style:name="P5" style:family="paragraph" style:parent-style-name="Содержание_20_курсовой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8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9" style:family="paragraph" style:parent-style-name="Text_20_body">
      <style:paragraph-properties style:writing-mode="lr-tb"/>
      <style:text-properties style:text-underline-style="none" fo:background-color="transparent"/>
    </style:style>
    <style:style style:name="P10" style:family="paragraph" style:parent-style-name="Text_20_body" style:list-style-name="WWNum2">
      <style:paragraph-properties style:writing-mode="lr-tb"/>
    </style:style>
    <style:style style:name="P11" style:family="paragraph" style:parent-style-name="Text_20_body" style:list-style-name="WWNum3">
      <style:paragraph-properties style:writing-mode="lr-tb"/>
    </style:style>
    <style:style style:name="P12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14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fo:background-color="transparent" style:font-weight-asian="normal" style:font-weight-complex="normal"/>
    </style:style>
    <style:style style:name="P15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16" style:family="paragraph" style:parent-style-name="Text_20_body" style:list-style-name="WWNum4">
      <style:paragraph-properties style:writing-mode="lr-tb"/>
    </style:style>
    <style:style style:name="P17" style:family="paragraph" style:parent-style-name="Text_20_body" style:list-style-name="WWNum5">
      <style:paragraph-properties style:writing-mode="lr-tb"/>
    </style:style>
    <style:style style:name="P18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20" style:family="paragraph" style:parent-style-name="Text_20_body" style:list-style-name="WWNum6">
      <style:paragraph-properties style:writing-mode="lr-tb"/>
    </style:style>
    <style:style style:name="P21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22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23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24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25" style:family="paragraph" style:parent-style-name="Text_20_body">
      <style:text-properties officeooo:paragraph-rsid="001e7ed2"/>
    </style:style>
    <style:style style:name="P26" style:family="paragraph" style:parent-style-name="Heading_20_2">
      <style:paragraph-properties fo:break-before="page"/>
      <style:text-properties officeooo:paragraph-rsid="001e7ed2"/>
    </style:style>
    <style:style style:name="P27" style:family="paragraph" style:parent-style-name="Heading_20_2">
      <style:text-properties officeooo:paragraph-rsid="001ed149"/>
    </style:style>
    <style:style style:name="P28" style:family="paragraph" style:parent-style-name="Text_20_body">
      <style:text-properties officeooo:paragraph-rsid="001ed149"/>
    </style:style>
    <style:style style:name="P29" style:family="paragraph" style:parent-style-name="Text_20_body" style:list-style-name="L1"/>
    <style:style style:name="P30" style:family="paragraph" style:parent-style-name="Text_20_body">
      <style:paragraph-properties style:writing-mode="lr-tb"/>
      <style:text-properties officeooo:rsid="000cc172" officeooo:paragraph-rsid="000cc172"/>
    </style:style>
    <style:style style:name="P31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32" style:family="paragraph" style:parent-style-name="Text_20_body">
      <style:paragraph-properties style:writing-mode="lr-tb"/>
      <style:text-properties officeooo:paragraph-rsid="000e8e9f"/>
    </style:style>
    <style:style style:name="P33" style:family="paragraph" style:parent-style-name="Text_20_body">
      <style:paragraph-properties style:writing-mode="lr-tb"/>
      <style:text-properties officeooo:rsid="000e8e9f" officeooo:paragraph-rsid="000e8e9f"/>
    </style:style>
    <style:style style:name="P34" style:family="paragraph" style:parent-style-name="Heading_20_2" style:list-style-name="">
      <style:paragraph-properties fo:margin-left="0cm" fo:text-align="star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Heading_20_2" style:list-style-name="WWNum1">
      <style:paragraph-properties fo:margin-left="0cm" fo:text-align="start" style:justify-single-word="false" fo:text-indent="1.251cm" style:auto-text-indent="false" fo:break-before="page" style:writing-mode="lr-tb"/>
    </style:style>
    <style:style style:name="P36" style:family="paragraph" style:parent-style-name="Text_20_body">
      <style:paragraph-properties style:writing-mode="lr-tb"/>
      <style:text-properties officeooo:paragraph-rsid="000ec0f8"/>
    </style:style>
    <style:style style:name="P37" style:family="paragraph" style:parent-style-name="Text_20_body">
      <style:paragraph-properties fo:margin-left="0cm" fo:text-indent="0cm" style:auto-text-indent="false" style:writing-mode="lr-tb"/>
      <style:text-properties officeooo:rsid="0015b670" officeooo:paragraph-rsid="0015b670"/>
    </style:style>
    <style:style style:name="P38" style:family="paragraph" style:parent-style-name="Text_20_body">
      <style:paragraph-properties fo:margin-top="0cm" fo:margin-bottom="0.247cm" style:contextual-spacing="false" style:writing-mode="lr-tb"/>
    </style:style>
    <style:style style:name="P39" style:family="paragraph" style:parent-style-name="Heading_20_1">
      <style:paragraph-properties fo:break-before="page"/>
      <style:text-properties officeooo:rsid="0018eb18" officeooo:paragraph-rsid="0018eb18"/>
    </style:style>
    <style:style style:name="P40" style:family="paragraph" style:parent-style-name="Text_20_body">
      <style:text-properties officeooo:paragraph-rsid="0018eb18"/>
    </style:style>
    <style:style style:name="P41" style:family="paragraph" style:parent-style-name="Text_20_body">
      <style:text-properties officeooo:rsid="0018eb18" officeooo:paragraph-rsid="0018eb18"/>
    </style:style>
    <style:style style:name="P42" style:family="paragraph" style:parent-style-name="Heading_20_1">
      <style:paragraph-properties fo:break-before="page"/>
      <style:text-properties officeooo:rsid="0015e9f3" officeooo:paragraph-rsid="0015e9f3"/>
    </style:style>
    <style:style style:name="P43" style:family="paragraph" style:parent-style-name="Text_20_body">
      <style:text-properties officeooo:rsid="001662ca" officeooo:paragraph-rsid="0015e9f3"/>
    </style:style>
    <style:style style:name="P44" style:family="paragraph" style:parent-style-name="Text_20_body">
      <style:text-properties officeooo:rsid="001662ca" officeooo:paragraph-rsid="001662ca"/>
    </style:style>
    <style:style style:name="P45" style:family="paragraph" style:parent-style-name="Text_20_body">
      <style:text-properties officeooo:paragraph-rsid="001662ca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none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11" style:family="text">
      <style:text-properties fo:font-weight="normal" officeooo:rsid="001e7ed2" style:font-weight-asian="normal" style:font-weight-complex="normal"/>
    </style:style>
    <style:style style:name="T12" style:family="text">
      <style:text-properties officeooo:rsid="001e7ed2"/>
    </style:style>
    <style:style style:name="T13" style:family="text">
      <style:text-properties officeooo:rsid="001ed149"/>
    </style:style>
    <style:style style:name="T14" style:family="text">
      <style:text-properties fo:font-weight="normal" officeooo:rsid="001ed149" style:font-weight-asian="normal" style:font-weight-complex="normal"/>
    </style:style>
    <style:style style:name="T15" style:family="text">
      <style:text-properties officeooo:rsid="000e8e9f"/>
    </style:style>
    <style:style style:name="T16" style:family="text">
      <style:text-properties officeooo:rsid="000b8767"/>
    </style:style>
    <style:style style:name="T17" style:family="text">
      <style:text-properties officeooo:rsid="000ec0f8" fo:background-color="transparent" loext:char-shading-value="0"/>
    </style:style>
    <style:style style:name="T18" style:family="text">
      <style:text-properties officeooo:rsid="000ec0f8"/>
    </style:style>
    <style:style style:name="T19" style:family="text">
      <style:text-properties officeooo:rsid="00114999"/>
    </style:style>
    <style:style style:name="T20" style:family="text">
      <style:text-properties officeooo:rsid="00132440"/>
    </style:style>
    <style:style style:name="T21" style:family="text">
      <style:text-properties officeooo:rsid="0015b670"/>
    </style:style>
    <style:style style:name="T22" style:family="text">
      <style:text-properties officeooo:rsid="00147be0"/>
    </style:style>
    <style:style style:name="T23" style:family="text">
      <style:text-properties officeooo:rsid="0015e9f3"/>
    </style:style>
    <style:style style:name="T24" style:family="text">
      <style:text-properties officeooo:rsid="00181f7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02_3548392200"/>Титульный лист<text:bookmark-end text:name="__RefHeading___Toc102_3548392200"/></text:h>
      <text:p text:style-name="P2"/>
      <text:p text:style-name="P2">По дисциплине пм 01 мдк 01 мдк 02</text:p>
      <text:p text:style-name="P2">Разветртыване LLM сервера для разработки</text:p>
      <text:p text:style-name="P2"><office:annotation loext:resolved="false"><dc:creator>&lt;анонимный&gt;</dc:creator><dc:date>2026-06-05T21:52:19</dc:date><text:p text:style-name="P3"><text:span text:style-name="T1">Доделать титульник по кайфу</text:span></text:p></office:annotation></text:p>
      <text:p text:style-name="P2"/>
      <text:list text:style-name="WWNum1">
        <text:list-item>
          <text:h text:style-name="P4" text:outline-level="1" loext:marker-style-name="T2"><text:bookmark-start text:name="__RefHeading___Toc104_3548392200_Копия_1"/><text:span text:style-name="T2">Содержание</text:span><text:bookmark-end text:name="__RefHeading___Toc104_3548392200_Копия_1"/><text:span text:style-name="T2"/></text:h>
        </text:list-item>
      </text:list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2_3548392200" office:name="Титульный лист" text:style-name="Index_20_Link" text:visited-style-name="Index_20_Link">Титульный лист<text:tab/>1</text:a></text:p>
          <text:p text:style-name="P5"><text:a xlink:type="simple" xlink:href="#__RefHeading___Toc104_3548392200_%D0%9A%D0%BE%D0%BF%D0%B8%D1%8F_1" office:name="Содержание" text:style-name="Index_20_Link" text:visited-style-name="Index_20_Link">Содержание<text:tab/>2</text:a></text:p>
          <text:p text:style-name="P5"><text:a xlink:type="simple" xlink:href="#__RefHeading___Toc3200_3548392200" office:name="Термины и определения" text:style-name="Index_20_Link" text:visited-style-name="Index_20_Link">Термины и определения<text:tab/>3</text:a></text:p>
          <text:p text:style-name="P5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4</text:a></text:p>
          <text:p text:style-name="P5"><text:a xlink:type="simple" xlink:href="#__RefHeading___Toc4210_3548392200" office:name="Введение" text:style-name="Index_20_Link" text:visited-style-name="Index_20_Link">Введение<text:tab/>5</text:a></text:p>
          <text:p text:style-name="P5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7</text:a></text:p>
          <text:p text:style-name="P5"><text:a xlink:type="simple" xlink:href="#__RefHeading___Toc868_2141837623" office:name="1.1 Ollama" text:style-name="Index_20_Link" text:visited-style-name="Index_20_Link">1.1 Ollama<text:tab/>7</text:a></text:p>
          <text:p text:style-name="P5"><text:a xlink:type="simple" xlink:href="#__RefHeading___Toc735_118244425" office:name="1.2 Llama.cpp" text:style-name="Index_20_Link" text:visited-style-name="Index_20_Link">1.2 Llama.cpp<text:tab/>8</text:a></text:p>
          <text:p text:style-name="P5"><text:a xlink:type="simple" xlink:href="#__RefHeading___Toc630_3774095318" office:name="1.3 Вывод анализа" text:style-name="Index_20_Link" text:visited-style-name="Index_20_Link">1.3 Вывод анализа<text:tab/>9</text:a></text:p>
          <text:p text:style-name="P5"><text:a xlink:type="simple" xlink:href="#__RefHeading___Toc632_3774095318" office:name="2 Определение аппаратных требований к серверной платформе" text:style-name="Index_20_Link" text:visited-style-name="Index_20_Link">2 Определение аппаратных требований к серверной платформе<text:tab/>10</text:a></text:p>
          <text:p text:style-name="P5"><text:a xlink:type="simple" xlink:href="#__RefHeading___Toc1721_1378716561" office:name="2.1 Факторы, определяющие аппаратные требования" text:style-name="Index_20_Link" text:visited-style-name="Index_20_Link">2.1 Факторы, определяющие аппаратные требования<text:tab/>10</text:a></text:p>
          <text:p text:style-name="P5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1</text:a></text:p>
          <text:p text:style-name="P5"><text:a xlink:type="simple" xlink:href="#__RefHeading___Toc4609_3774095318" office:name="3.1 Подготовка програмного окружения" text:style-name="Index_20_Link" text:visited-style-name="Index_20_Link">3.1 Подготовка програмного окружения<text:tab/>11</text:a></text:p>
          <text:p text:style-name="P5"><text:a xlink:type="simple" xlink:href="#__RefHeading___Toc4611_3774095318" office:name="3.2 Скрипт запуска сервера" text:style-name="Index_20_Link" text:visited-style-name="Index_20_Link">3.2 Скрипт запуска сервера<text:tab/>11</text:a></text:p>
          <text:p text:style-name="P5"><text:a xlink:type="simple" xlink:href="#__RefHeading___Toc4613_3774095318" office:name="3.3 Работа модели" text:style-name="Index_20_Link" text:visited-style-name="Index_20_Link">3.3 Работа модели<text:tab/>13</text:a></text:p>
          <text:p text:style-name="P5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14</text:a></text:p>
          <text:p text:style-name="P5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14</text:a></text:p>
          <text:p text:style-name="P5"><text:a xlink:type="simple" xlink:href="#__RefHeading___Toc6078_3774095318" office:name="4.2 Проверка работоспособности интеграции" text:style-name="Index_20_Link" text:visited-style-name="Index_20_Link">4.2 Проверка работоспособности интеграции<text:tab/>15</text:a></text:p>
          <text:p text:style-name="P5"><text:a xlink:type="simple" xlink:href="#__RefHeading___Toc775_3015941620" office:name="4.3 Выводы по интеграции" text:style-name="Index_20_Link" text:visited-style-name="Index_20_Link">4.3 Выводы по интеграции<text:tab/>17</text:a></text:p>
          <text:p text:style-name="P5"><text:a xlink:type="simple" xlink:href="#__RefHeading___Toc1723_1378716561" office:name="Заключение" text:style-name="Index_20_Link" text:visited-style-name="Index_20_Link">Заключение<text:tab/>18</text:a></text:p>
          <text:p text:style-name="P5"><text:a xlink:type="simple" xlink:href="#__RefHeading___Toc6349_3015941620" office:name="Список использованных источников" text:style-name="Index_20_Link" text:visited-style-name="Index_20_Link">Список использованных источников<text:tab/>19</text:a></text:p>
        </text:index-body>
      </text:table-of-content>
      <text:p text:style-name="P6" loext:marker-style-name="T2"/>
      <text:p text:style-name="P6" loext:marker-style-name="T2"/>
      <text:list text:continue-numbering="true" text:style-name="WWNum1">
        <text:list-item>
          <text:h text:style-name="P7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2"/>
      <text:p text:style-name="P2">В настоящей курсовой работе (проекте) применяют следующие термины с соответствующими определениями:</text:p>
      <text:p text:style-name="P8">API (Application Programming Interface) - программный интерфейс, то есть описание способов взаимодействия одной компьютерной программы с другими.</text:p>
      <text:p text:style-name="P8">AI -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.</text:p>
      <text:p text:style-name="P8">LLM (large language model) - <text:span text:style-name="T3">Большая языковая модель основанная на</text:span><text:bookmark text:name="mwCg"/><text:span text:style-name="T3"> нейро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3"> текста методами самообучения.</text:span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2" loext:marker-style-name="T3"><office:annotation loext:resolved="false"><dc:creator>&lt;анонимный&gt;</dc:creator><dc:date>2026-06-05T21:53:47</dc:date><text:p text:style-name="P3"><text:span text:style-name="T1">По алфавиту</text:span></text:p></office:annotation></text:p>
      <text:list text:continue-numbering="true" text:style-name="WWNum1">
        <text:list-item>
          <text:h text:style-name="P7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2"/>
      <text:p text:style-name="P2">В настоящей курсовой работе (проекте) применяют следующие сокращения и обозначения:</text:p>
      <text:p text:style-name="P2"/>
      <text:list xml:id="list214254089904782" text:continue-numbering="true" text:style-name="WWNum1">
        <text:list-item>
          <text:h text:style-name="P7" text:outline-level="1"><text:bookmark-start text:name="__RefHeading___Toc4210_3548392200"/>Введение<text:bookmark-end text:name="__RefHeading___Toc4210_3548392200"/></text:h>
        </text:list-item>
      </text:list>
      <text:p text:style-name="P2">Современные IT-компании активно внедряют инструменты искусственного интеллекта в процессы разработки. Согласно <text:span text:style-name="T4">исследованию</text:span> Stack Overflow 2025 года, 84% разработчиков используют или планируют использовать AI-инструменты, при этом 51% применяют их ежедневно. <text:span text:style-name="T4">Исследование</text:span><office:annotation loext:resolved="false"><dc:creator>&lt;анонимный&gt;</dc:creator><dc:date>2026-06-05T21:54:18</dc:date><text:p text:style-name="P3"><text:span text:style-name="T1">Возможно 1 исслдования хватит </text:span></text:p></office:annotation><text:span text:style-name="T4"> C</text:span>omplexity Science Hub показывает, что доля AI-ассистированного кода на GitHub выросла с 5% в 2022 году до 29% к концу 2024 года.</text:p>
      <text:p text:style-name="P2">Однако рост популярности облачных AI-решений (GitHub Copilot, ChatGPT) обостряет проблему безопасности интеллектуальной собственности. Передача фрагментов кодовой базы сторонним серверам создаёт риски утечки конфиденциальных алгоритмов и коммерческой тайны. <text:span text:style-name="T4">Эксперты отмечают</text:span><office:annotation loext:resolved="false"><dc:creator>&lt;анонимный&gt;</dc:creator><dc:date>2026-06-05T21:54:07</dc:date><text:p text:style-name="P3"><text:span text:style-name="T1">Добавить ссылки на исследования</text:span></text:p></office:annotation><text:span text:style-name="T4">, </text:span>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8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2">Существует ряд open-source инструментов для локального запуска моделей (Ollama, llama.cpp, vLLM)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2"><text:soft-page-break/>Объект и предмет исследования:</text:p>
      <text:list text:style-name="WWNum2">
        <text:list-item>
          <text:list>
            <text:list-item>
              <text:p text:style-name="P10"><text:span text:style-name="Strong_20_Emphasis"><text:span text:style-name="T5">Объект исследования</text:span></text:span>: процесс организации безопасной локальной инфраструктуры для использования LLM в разработке ПО.</text:p>
            </text:list-item>
            <text:list-item>
              <text:p text:style-name="P10">Предмет исследования: методы развёртывания, администрирования и интеграции локального LLM-сервера (на базе llama-server) в рабочую среду IT-специалистов, в частности - подключение к Code OSS.</text:p>
            </text:list-item>
          </text:list>
        </text:list-item>
      </text:list>
      <text:p text:style-name="P8"><text:span text:style-name="Strong_20_Emphasis"><text:span text:style-name="T5">Цель работы: разработать и экспериментально подтвердить работоспособность локального LLM-сервера на базе llama-server, обеспечить его администрирование в условиях локальной сети и выполнить интеграцию со средой разработки Code OSS.</text:span></text:span></text:p>
      <text:p text:style-name="P8"><text:span text:style-name="Strong_20_Emphasis"><text:span text:style-name="T5">Задачи:</text:span></text:span><office:annotation loext:resolved="false"><dc:creator>&lt;анонимный&gt;</dc:creator><dc:date>2026-06-05T22:00:06</dc:date><text:p text:style-name="P3"><text:span text:style-name="T1">Куда то добавить мою конфигурацию</text:span></text:p></office:annotation></text:p>
      <text:list text:style-name="WWNum3">
        <text:list-item>
          <text:p text:style-name="P11">Провести анализ существующих решений для локального развёртывания LLM и обосновать выбор llama-server.</text:p>
        </text:list-item>
        <text:list-item>
          <text:p text:style-name="P11" loext:marker-style-name="T4"><text:span text:style-name="T4">Определить минимальные аппаратные требования и выполнить установку и настройку llama-server в локальной сети.</text:span><text:span text:style-name="T4"/></text:p>
        </text:list-item>
        <text:list-item>
          <text:p text:style-name="P11" loext:marker-style-name="T4"><text:span text:style-name="T4">Разработать конфигурацию сервера, обеспечивающую стабильную работу.</text:span><text:span text:style-name="T4"/></text:p>
        </text:list-item>
        <text:list-item>
          <text:p text:style-name="P11"><text:span text:style-name="T4">Реализовать интеграцию локального LLM-сервера с Code OSS на</text:span> клиентском компьютере.</text:p>
        </text:list-item>
        <text:list-item>
          <text:p text:style-name="P11">Выполнить экспериментальную проверку работоспособности решения .</text:p>
        </text:list-item>
        <text:list-item>
          <text:p text:style-name="P11" loext:marker-style-name="T4"><text:span text:style-name="T4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3"><text:span text:style-name="T1">Сделать краткое содержание </text:span></text:p></office:annotation></text:p>
        </text:list-item>
      </text:list>
      <text:h text:style-name="P12" text:outline-level="1"><text:span text:style-name="Strong_20_Emphasis"><text:span text:style-name="T6"/></text:span></text:h>
      <text:list text:continue-list="list214254089904782" text:style-name="WWNum1">
        <text:list-item>
          <text:h text:style-name="P13" text:outline-level="1"><text:bookmark-start text:name="__RefHeading___Toc866_2141837623"/><text:span text:style-name="Strong_20_Emphasis"><text:span text:style-name="T6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8"><text:span text:style-name="Strong_20_Emphasis"/></text:p>
      <text:p text:style-name="P8"><text:span text:style-name="Strong_20_Emphasis"><text:span text:style-name="T5">Для организации локального LLM-сервера, доступного нескольким пользователям в корпоративной сети, наиболее актуальными являются два решения: Ollama и llama.cpp (с компонентом llama-server ). Оба инструмента базируются на ед</text:span></text:span><text:span text:style-name="Strong_20_Emphasis"><text:span text:style-name="T7">иной технологической основе (формат GGUF, оптимизации CPU/GPU), но принципиально различаются по архитектуре и подходу к администрированию. // вставить источники на сравнение olama vs llama.cpp</text:span></text:span></text:p>
      <text:p text:style-name="P14" loext:marker-style-name="T7"><text:span text:style-name="Strong_20_Emphasis"><text:span text:style-name="T7"/></text:span></text:p>
      <text:list xml:id="list214254739401759" text:continue-numbering="true" text:style-name="WWNum1">
        <text:list-item>
          <text:list>
            <text:list-item>
              <text:h text:style-name="P15" text:outline-level="2"><text:bookmark-start text:name="__RefHeading___Toc868_2141837623"/><text:span text:style-name="Strong_20_Emphasis"><text:span text:style-name="T8">1.1 Ollama</text:span></text:span><text:bookmark-end text:name="__RefHeading___Toc868_2141837623"/></text:h>
            </text:list-item>
          </text:list>
        </text:list-item>
      </text:list>
      <text:p text:style-name="P2"><text:span text:style-name="Strong_20_Emphasis"/></text:p>
      <text:p text:style-name="P8"><text:span text:style-name="Strong_20_Emphasis"><text:span text:style-name="T5">Ollama</text:span></text:span><text:span text:style-name="Strong_20_Emphasis"><text:span text:style-name="T7"> позиционируется как «LLM-движок для разработчиков»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2"><text:span text:style-name="Strong_20_Emphasis"><text:span text:style-name="T7">Достоинства:</text:span></text:span></text:p>
      <text:list text:style-name="WWNum4">
        <text:list-item>
          <text:list>
            <text:list-item>
              <text:p text:style-name="P16"><text:span text:style-name="Strong_20_Emphasis"><text:span text:style-name="T5">Установка одной командой, готовые пакеты для всех ОС</text:span></text:span></text:p>
            </text:list-item>
            <text:list-item>
              <text:p text:style-name="P16"><text:span text:style-name="Strong_20_Emphasis"><text:span text:style-name="T5">Встроенный реестр моделей</text:span></text:span></text:p>
            </text:list-item>
            <text:list-item>
              <text:p text:style-name="P16"><text:span text:style-name="Strong_20_Emphasis"><text:span text:style-name="T5">Open-AI совместимый API</text:span></text:span></text:p>
            </text:list-item>
          </text:list>
        </text:list-item>
      </text:list>
      <text:p text:style-name="P2"><text:span text:style-name="Strong_20_Emphasis"><text:span text:style-name="T5">Недостатки:</text:span></text:span></text:p>
      <text:list text:style-name="WWNum5">
        <text:list-item>
          <text:list>
            <text:list-item>
              <text:p text:style-name="P17"><text:span text:style-name="Strong_20_Emphasis"><text:span text:style-name="T5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17"><text:span text:style-name="Strong_20_Emphasis"><text:span text:style-name="T5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17"><text:span text:style-name="Strong_20_Emphasis"><text:span text:style-name="T5">Отсутсвие встроенного веб-интерфейса </text:span></text:span></text:p>
            </text:list-item>
            <text:list-item>
              <text:p text:style-name="P17"><text:soft-page-break/><text:span text:style-name="Strong_20_Emphasis"><text:span text:style-name="T5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18" loext:marker-style-name="T5"><text:span text:style-name="Strong_20_Emphasis"><text:span text:style-name="T5"/></text:span></text:p>
      <text:list xml:id="list214254644903561" text:continue-list="list214254739401759" text:style-name="WWNum1">
        <text:list-item>
          <text:list>
            <text:list-item>
              <text:h text:style-name="P15" text:outline-level="2"><text:bookmark-start text:name="__RefHeading___Toc735_118244425"/><text:span text:style-name="Strong_20_Emphasis"><text:span text:style-name="T6">1.2 Llama.cpp</text:span></text:span><text:bookmark-end text:name="__RefHeading___Toc735_118244425"/></text:h>
            </text:list-item>
          </text:list>
        </text:list-item>
      </text:list>
      <text:p text:style-name="P19" loext:marker-style-name="T5"><text:span text:style-name="Strong_20_Emphasis"><text:span text:style-name="T5"/></text:span></text:p>
      <text:p text:style-name="P8"><text:span text:style-name="Strong_20_Emphasis"><text:span text:style-name="T5">llama-server — это встроенный HTTP-сервер, входящий в состав проекта llama.cpp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2"><text:span text:style-name="Strong_20_Emphasis"><text:span text:style-name="T5">Достоинства:</text:span></text:span></text:p>
      <text:list text:style-name="WWNum6">
        <text:list-item>
          <text:list>
            <text:list-item>
              <text:p text:style-name="P20"><text:span text:style-name="Strong_20_Emphasis"><text:span text:style-name="T5">Параллельная обработка сессий</text:span></text:span><text:span text:style-name="Strong_20_Emphasis"><text:span text:style-name="T9"> — </text:span></text:span><text:span text:style-name="Strong_20_Emphasis"><text:span text:style-name="T5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20"><text:span text:style-name="Strong_20_Emphasis"><text:span text:style-name="T5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20"><text:span text:style-name="Strong_20_Emphasis"><text:span text:style-name="T5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20"><text:span text:style-name="Strong_20_Emphasis"><text:span text:style-name="T5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20"><text:span text:style-name="Strong_20_Emphasis"><text:span text:style-name="T5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21" loext:marker-style-name="T5"><text:span text:style-name="Strong_20_Emphasis"><text:span text:style-name="T5"/></text:span></text:p>
      <text:list text:continue-list="list214254644903561" text:style-name="WWNum1">
        <text:list-item>
          <text:list>
            <text:list-item>
              <text:h text:style-name="P22" text:outline-level="2"><text:bookmark-start text:name="__RefHeading___Toc630_3774095318"/><text:span text:style-name="Strong_20_Emphasis"><text:span text:style-name="T6">1.3 Вывод анализа </text:span></text:span><text:bookmark-end text:name="__RefHeading___Toc630_3774095318"/></text:h>
            </text:list-item>
          </text:list>
        </text:list-item>
      </text:list>
      <text:p text:style-name="P23"><text:span text:style-name="Strong_20_Emphasis"><text:span text:style-name="T6"/></text:span></text:p>
      <text:p text:style-name="P2"><text:span text:style-name="Strong_20_Emphasis"><text:span text:style-name="T5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2"><text:span text:style-name="Strong_20_Emphasis"><text:span text:style-name="T5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2"><text:span text:style-name="Strong_20_Emphasis"/></text:p>
      <text:h text:style-name="P12" text:outline-level="1"><text:span text:style-name="Strong_20_Emphasis"><text:span text:style-name="T6"/></text:span></text:h>
      <text:list text:continue-numbering="true" text:style-name="WWNum1">
        <text:list-item>
          <text:h text:style-name="P13" text:outline-level="1"><text:bookmark-start text:name="__RefHeading___Toc632_3774095318"/><text:span text:style-name="Strong_20_Emphasis"><text:span text:style-name="T6">2 Определение аппаратных требований к серверной платформе</text:span></text:span><text:bookmark-end text:name="__RefHeading___Toc632_3774095318"/></text:h>
        </text:list-item>
      </text:list>
      <text:p text:style-name="P24" loext:marker-style-name="T10"><text:span text:style-name="Strong_20_Emphasis"><text:span text:style-name="T10"/></text:span></text:p>
      <text:p text:style-name="P8"><text:span text:style-name="Strong_20_Emphasis"><text:span text:style-name="T5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1721_1378716561"/><text:span text:style-name="Strong_20_Emphasis">2.1 Факторы, определяющие аппаратные требования</text:span><text:bookmark-end text:name="__RefHeading___Toc1721_1378716561"/></text:h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5">Характеристики модели — </text:span></text:span><text:span text:style-name="Strong_20_Emphasis"><text:span text:style-name="T11">о</text:span></text:span><text:span text:style-name="Strong_20_Emphasis"><text:span text:style-name="T5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 и количеству параллельных сессий.</text:span></text:span></text:p>
      <text:p text:style-name="Text_20_body"><text:span text:style-name="Strong_20_Emphasis"><text:span text:style-name="T5">Многопользовательская нагрузка — </text:span></text:span><text:span text:style-name="Strong_20_Emphasis"><text:span text:style-name="T11">п</text:span></text:span><text:span text:style-name="Strong_20_Emphasis"><text:span text:style-name="T5">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 собственного KV-кэша.</text:span></text:span></text:p>
      <text:p text:style-name="Text_20_body"><text:span text:style-name="Strong_20_Emphasis"><text:span text:style-name="T5">Размер контекстного окна — </text:span></text:span><text:span text:style-name="Strong_20_Emphasis"><text:span text:style-name="T11">у</text:span></text:span><text:span text:style-name="Strong_20_Emphasis"><text:span text:style-name="T5">величение контекстного окна существенно повышает потребление памяти. Зависимость линейная: при удвоении контекстного окна вдвое возрастает размер KV-кэша на каждую сессию.</text:span></text:span></text:p>
      <text:p text:style-name="P25"><text:span text:style-name="Strong_20_Emphasis"><text:span text:style-name="T11"/></text:span></text:p>
      <text:list text:continue-numbering="true" text:style-name="WWNum1">
        <text:list-item>
          <text:list>
            <text:list-item>
              <text:h text:style-name="P26" text:outline-level="2"><text:span text:style-name="Strong_20_Emphasis"><text:span text:style-name="T12">2.2 </text:span></text:span><text:span text:style-name="Strong_20_Emphasis"><text:span text:style-name="T13">Требования к ОЗУ</text:span></text:span><text:span text:style-name="Strong_20_Emphasis"><text:span text:style-name="T12"> </text:span></text:span></text:h>
            </text:list-item>
          </text:list>
        </text:list-item>
      </text:list>
      <text:p text:style-name="P25"><text:span text:style-name="Strong_20_Emphasis"/></text:p>
      <text:p text:style-name="P25"><text:span text:style-name="Strong_20_Emphasis"><text:span text:style-name="T5">Общий объём оперативной памяти, необходимый для работы llama-server в многопользовательской среде, складывается из трёх основных компонентов.</text:span></text:span></text:p>
      <text:p text:style-name="P25"><text:span text:style-name="Strong_20_Emphasis"><text:span text:style-name="T5">Общий объём оперативной памяти для llama-server складывается из трёх составляющих.</text:span></text:span></text:p>
      <text:p text:style-name="P25"><text:span text:style-name="Strong_20_Emphasis"><text:span text:style-name="T5">Размер модели — определяется количеством параметров и типом квантования. Например, модель 7B в Q4_K_M занимает ~4 ГБ, а в Q8_0 — уже ~7 ГБ. Чем выше точность квантования, тем больше памяти требуется.</text:span></text:span></text:p>
      <text:p text:style-name="P25"><text:span text:style-name="Strong_20_Emphasis"><text:span text:style-name="T5">KV-кэш — выделяется для каждой параллельной сессии и хранит промежуточные состояния токенов контекстного окна. Его размер зависит от архитектуры модели, длины контекста и количества одновременных сессий. При увеличении контекстного окна с 2048 до 8192 токенов потребление памяти на сессию растёт в четыре раза. Каждая новая параллельная сессия добавляет свой KV-кэш.</text:span></text:span></text:p>
      <text:p text:style-name="P25"><text:span text:style-name="Strong_20_Emphasis"><text:span text:style-name="T5">Служебные расходы — буферы, очереди и управляющие структуры, обычно составляющие 5-10% от основного объёма.</text:span></text:span></text:p>
      <text:p text:style-name="P25"><text:span text:style-name="Strong_20_Emphasis"><text:span text:style-name="T5">Таким образом, итоговое потребление памяти всегда больше простого размера модели. Для модели 7B с контекстом 4096 токенов и тремя параллельными сессиями требуется 8-12 ГБ, для модели 13B при тех же условиях — 16-20 ГБ.</text:span></text:span></text:p>
      <text:p text:style-name="P25"><text:span text:style-name="Strong_20_Emphasis"><text:span text:style-name="T5">Для одного пользователя модели 7B достаточно 6-8 ГБ ОЗУ. Для трёх-четырёх разработчиков — уже 16 ГБ. Для модели 13B и пяти пользователей рекомендуется 32 ГБ. Также стоит учитывать, что длинные ответы увеличивают заполнение KV-кэша, что дополнительно повышает потребление памяти.</text:span></text:span></text:p>
      <text:list text:continue-numbering="true" text:style-name="WWNum1">
        <text:list-item>
          <text:list>
            <text:list-item>
              <text:h text:style-name="P27" text:outline-level="2"><text:soft-page-break/><text:span text:style-name="Strong_20_Emphasis"><text:span text:style-name="T13">2.3 Требования к CPU и GPU</text:span></text:span></text:h>
            </text:list-item>
          </text:list>
        </text:list-item>
      </text:list>
      <text:p text:style-name="P28"><text:span text:style-name="Strong_20_Emphasis"/></text:p>
      <text:p text:style-name="Text_20_body"><text:span text:style-name="Strong_20_Emphasis"><text:span text:style-name="T5">llama.cpp эффективно работает как на x86_64, так и на AArch64 архитектурах. При использовании CPU для вычислений критическое значение имеет количество ядер и поддержка векторных инструкций (AVX2, AVX-512 для Intel/AMD или NEON для ARM).</text:span></text:span></text:p>
      <text:p text:style-name="Text_20_body"><text:span text:style-name="Strong_20_Emphasis"><text:span text:style-name="T5">Для многопользовательских сценариев на серверах с большим количеством ядер рекомендуется использовать CPU affinity для привязки процессов к конкретным ядрам, </text:span></text:span><text:span text:style-name="Strong_20_Emphasis"><text:span text:style-name="T14">а так же </text:span></text:span><text:span text:style-name="Strong_20_Emphasis"><text:span text:style-name="T5">NUMA-aware оптимизации для работы с неоднородной памятью.</text:span></text:span></text:p>
      <text:p text:style-name="Text_20_body"><text:span text:style-name="Strong_20_Emphasis"><text:span text:style-name="T5">При использовании GPU для ускорения вычислений (с параметром -ngl) достаточно 2-4 ядер CPU для управления передачей данных между памятью и GPU. Основная нагрузка ложится на видеокарту, поэтому критическими становятся объём VRAM и пропускная способность памяти.</text:span></text:span></text:p>
      <text:list xml:id="list214254226939054" text:continue-numbering="true" text:style-name="WWNum1">
        <text:list-item>
          <text:list>
            <text:list-item>
              <text:list>
                <text:list-item>
                  <text:h text:style-name="Heading_20_2" text:outline-level="2"><text:span text:style-name="Strong_20_Emphasis">2.4 Требования к дисковому пространству</text:span></text:h>
                </text:list-item>
              </text:list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5">Дисковое пространство необходимо для хранения файлов моделей и логов сервера:</text:span></text:span></text:p>
      <text:p text:style-name="Text_20_body"><text:span text:style-name="Strong_20_Emphasis"><text:span text:style-name="T5">Файлы моделей — вес зависит от количества параметров и типа квантования:</text:span></text:span></text:p>
      <text:list text:style-name="L1">
        <text:list-item>
          <text:list>
            <text:list-item>
              <text:p text:style-name="P29"><text:span text:style-name="Strong_20_Emphasis"><text:span text:style-name="T5">Модель 7B в Q4_K_M: ~3.5-4 ГБ;</text:span></text:span></text:p>
            </text:list-item>
            <text:list-item>
              <text:p text:style-name="P29"><text:span text:style-name="Strong_20_Emphasis"><text:span text:style-name="T5">Модель 13B в Q4_K_M: ~7-8 ГБ;</text:span></text:span></text:p>
            </text:list-item>
            <text:list-item>
              <text:p text:style-name="P29"><text:span text:style-name="Strong_20_Emphasis"><text:span text:style-name="T5">Модель 70B в Q4_K_M: ~35-40 ГБ.</text:span></text:span></text:p>
            </text:list-item>
          </text:list>
        </text:list-item>
      </text:list>
      <text:p text:style-name="Text_20_body"><text:span text:style-name="Strong_20_Emphasis"><text:span text:style-name="T5">Логирование — рекомендуется выделить 5-10 ГБ для хранения истории запросов и системных логов.</text:span></text:span></text:p>
      <text:p text:style-name="Text_20_body"><text:soft-page-break/><text:span text:style-name="Strong_20_Emphasis"><text:span text:style-name="T5">Системные требования ОС — от 20 до 40 ГБ в зависимости от дистрибутива Linux.</text:span></text:span></text:p>
      <text:p text:style-name="Text_20_body"><text:span text:style-name="Strong_20_Emphasis"><text:span text:style-name="T5">Рекомендуемый общий объём: от 32 ГБ для комфортной работы.</text:span></text:span></text:p>
      <text:list text:continue-list="list214254226939054" text:style-name="WWNum1">
        <text:list-item>
          <text:h text:style-name="P13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2"/>
      <text:p text:style-name="P30">Серверная платформа была разработана на Arch Linu. Выбор конкретного дистрибутива Linux не имеет значения. Llama.cpp компилируется из исходного кода и будет работать любом дистрибутиве с поддержкой компилятора g++. Модель запускалась на процессоре, а также часть слоев на GPU.</text:p>
      <text:list text:continue-numbering="true" text:style-name="WWNum1">
        <text:list-item>
          <text:list>
            <text:list-item>
              <text:h text:style-name="P15" text:outline-level="2"><text:bookmark-start text:name="__RefHeading___Toc4609_3774095318"/>3.1 Подготовка програмного окружения<text:bookmark-end text:name="__RefHeading___Toc4609_3774095318"/></text:h>
            </text:list-item>
          </text:list>
        </text:list-item>
      </text:list>
      <text:p text:style-name="P31"/>
      <text:p text:style-name="P2">Llama.cpp собирается из исходного кода, из репозитория проекта на GitHub. Компиляция производилась прямо на <text:span text:style-name="T15">компьютере</text:span> при помощи CMake, что делает исполняемые файлы оптимизироваными для конкректного процессора.</text:p>
      <text:p text:style-name="P32">Для работы на ограниченном оборудовании была выбрана квантованная модель <text:span text:style-name="T15">Q</text:span><text:span text:style-name="T16">wen2.5-coder</text:span> в формате GGUF с квантованием Q<text:span text:style-name="T15">8</text:span>_0. Выбор модели определялся её малым размером (~<text:span text:style-name="T15">1,8ГБ</text:span>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15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31"/>
      <text:p text:style-name="P33">Для удобного запуска llama-server необходимо написать bush скрипт, скрипт на рисунке <text:sequence-ref text:reference-format="value" text:ref-name="refDrawing0">1</text:sequence-ref>:</text:p>
      <text:p text:style-name="P33"><draw:frame draw:style-name="fr1" draw:name="Врезка4" text:anchor-type="char" svg:width="16.501cm" draw:z-index="0"><draw:text-box fo:min-height="14.63cm"><text:p text:style-name="Drawing"><draw:frame draw:style-name="fr2" draw:name="Изображение4" text:anchor-type="paragraph" svg:width="16.501cm" style:rel-width="100%" svg:height="14.63cm" style:rel-height="scale" draw:z-index="1"><draw:image xlink:href="Pictures/100000010000028D0000024311404570.png" xlink:type="simple" xlink:show="embed" xlink:actuate="onLoad" draw:mime-type="image/png"/></draw:frame>Рисунок <text:sequence text:ref-name="refDrawing0" text:name="Drawing" text:formula="ooow:Drawing+1" style:num-format="1">1</text:sequence><text:s/>- Скрипт запуска сервера</text:p></draw:text-box></draw:frame><text:soft-page-break/></text:p>
      <text:p text:style-name="P2" loext:marker-style-name="T4"><text:span text:style-name="T4">Параметр «-c </text:span><text:span text:style-name="T17">4096</text:span><text:span text:style-name="T4">» был выбран как компромиссное значение: для многих задач, контекста в </text:span><text:span text:style-name="T17">4096</text:span><text:span text:style-name="T4"> токена достаточно. </text:span><text:span text:style-name="T17">Параметр «-ngl 33» загружает 33 слоя модели в видеопамять и они обрабатываются GPU.</text:span><text:span text:style-name="T4"> </text:span><text:span text:style-name="T17">Параметр «--threads 4» отвечает за количество ядер процессора отведенных под вычесления. </text:span><text:span text:style-name="T4">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.</text:span></text:p>
      <text:h text:style-name="P34" text:outline-level="2"/>
      <text:list text:continue-numbering="true" text:style-name="WWNum1">
        <text:list-item>
          <text:list>
            <text:list-item>
              <text:h text:style-name="P35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31"/>
      <text:p text:style-name="P36">Для проверки работоспособности модели я <text:span text:style-name="T18">на компьютере</text:span> открыл в браузере веб интерфейс llama-srver по адресу «hhtp://<text:span text:style-name="T18">127.0.0.1</text:span>:<text:span text:style-name="T18">8080</text:span>». В чате с моделью протестировал тестовый промт, <text:span text:style-name="T19">резултат на рисунке </text:span><text:span text:style-name="T19"><text:sequence-ref text:reference-format="value" text:ref-name="refDrawing1">2</text:sequence-ref></text:span><text:span text:style-name="T19">:</text:span></text:p>
      <text:p text:style-name="P36"><draw:frame draw:style-name="fr3" draw:name="Врезка1" text:anchor-type="char" svg:width="16.501cm" draw:z-index="2"><draw:text-box fo:min-height="15.205cm"><text:p text:style-name="Drawing"><draw:frame draw:style-name="fr2" draw:name="Изображение2" text:anchor-type="paragraph" svg:width="16.501cm" style:rel-width="100%" svg:height="15.205cm" style:rel-height="scale" draw:z-index="3"><draw:image xlink:href="Pictures/10000001000003620000031EF8BE9D40.png" xlink:type="simple" xlink:show="embed" xlink:actuate="onLoad" draw:mime-type="image/png"/></draw:frame>Рисунок <text:sequence text:ref-name="refDrawing1" text:name="Drawing" text:formula="ooow:Drawing+1" style:num-format="1">2</text:sequence><text:s/>- Вэб интерфейс сервера</text:p></draw:text-box></draw:frame></text:p>
      <text:p text:style-name="P36">Модель успешно дала ответ на запрос, что свидетельствует о правильной работе llama-server.</text:p>
      <text:h text:style-name="P12" text:outline-level="1"/>
      <text:list text:continue-numbering="true" text:style-name="WWNum1">
        <text:list-item>
          <text:h text:style-name="P13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15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31"/>
      <text:p text:style-name="P2" loext:marker-style-name="T5"><text:span text:style-name="T5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. Continue позиционируется как AI-ассистент для разработчиков, поддерживающий подключение к различным моделям, включая локальные</text:span><text:span text:style-name="T5"/></text:p>
      <text:p text:style-name="P2" loext:marker-style-name="T5"><text:span text:style-name="T5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. Это позволяет использовать расширение в среде разработки, где приоритетом является полная открытость и отсутствие телеметрии Microsoft.</text:span><text:span text:style-name="T5"/></text:p>
      <text:p text:style-name="P2">Continue использует конфигурационный файл в формате YAML, который по умолчанию находится в директории ~/.continue/config.yaml (в Linux-системах). Для подключения к локальному серверу на базе llama.cpp была создана следующая конфигурация, <text:span text:style-name="T20">на рисунке </text:span><text:span text:style-name="T20"><text:sequence-ref text:reference-format="value" text:ref-name="refDrawing2">3</text:sequence-ref></text:span>:</text:p>
      <text:p text:style-name="P2"><draw:frame draw:style-name="fr1" draw:name="Врезка5" text:anchor-type="char" svg:width="15.953cm" draw:z-index="4"><draw:text-box fo:min-height="12.434cm"><text:p text:style-name="Drawing"><draw:frame draw:style-name="fr2" draw:name="Изображение5" text:anchor-type="paragraph" svg:width="15.953cm" style:rel-width="100%" svg:height="12.434cm" style:rel-height="scale" draw:z-index="5"><draw:image xlink:href="Pictures/100000010000025B000001D6A176FB4A.png" xlink:type="simple" xlink:show="embed" xlink:actuate="onLoad" draw:mime-type="image/png"/></draw:frame>Рисунок <text:sequence text:ref-name="refDrawing2" text:name="Drawing" text:formula="ooow:Drawing+1" style:num-format="1">3</text:sequence><text:s/>- Конфигурация плагина Continue</text:p></draw:text-box></draw:frame><text:soft-page-break/></text:p>
      <text:list text:continue-numbering="true" text:style-name="WWNum1">
        <text:list-item>
          <text:list>
            <text:list-item>
              <text:h text:style-name="P15" text:outline-level="2"><text:bookmark-start text:name="__RefHeading___Toc6078_3774095318"/>4.<text:span text:style-name="T21">2</text:span> Проверка работоспособности интеграции<text:bookmark-end text:name="__RefHeading___Toc6078_3774095318"/></text:h>
            </text:list-item>
          </text:list>
        </text:list-item>
      </text:list>
      <text:p text:style-name="P31"/>
      <text:p text:style-name="P2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2">Для проверки качества работы модели был отправлен <text:span text:style-name="T22">запрос на написание прграммы для рисования квадрата из выбранного символа</text:span>. Резултат на рисунке <text:sequence-ref text:reference-format="value" text:ref-name="refDrawing3">4</text:sequence-ref>.</text:p>
      <text:p text:style-name="P37"><draw:frame draw:style-name="fr1" draw:name="Врезка2" text:anchor-type="char" svg:width="16.501cm" draw:z-index="6"><draw:text-box fo:min-height="16.545cm"><text:p text:style-name="Drawing"><draw:frame draw:style-name="fr2" draw:name="Изображение1" text:anchor-type="paragraph" svg:width="16.501cm" style:rel-width="100%" svg:height="15.896cm" style:rel-height="scale" draw:z-index="7"><draw:image xlink:href="Pictures/10000001000003340000031669205A5B.png" xlink:type="simple" xlink:show="embed" xlink:actuate="onLoad" draw:mime-type="image/png"/></draw:frame>Рисунок <text:sequence text:ref-name="refDrawing3" text:name="Drawing" text:formula="ooow:Drawing+1" style:num-format="1">4</text:sequence><text:s/>- Код сгенерированный моделью</text:p></draw:text-box></draw:frame><text:soft-page-break/>Код успешно компилируется и работает, <text:span text:style-name="T23">показано на рисунке </text:span><text:span text:style-name="T23"><text:sequence-ref text:reference-format="value" text:ref-name="refDrawing4">5</text:sequence-ref></text:span><text:span text:style-name="T23">:</text:span></text:p>
      <text:p text:style-name="P37"><draw:frame draw:style-name="fr1" draw:name="Врезка3" text:anchor-type="char" svg:width="16.501cm" draw:z-index="8"><draw:text-box fo:min-height="7.948cm"><text:p text:style-name="Drawing"><draw:frame draw:style-name="fr2" draw:name="Изображение3" text:anchor-type="paragraph" svg:width="16.501cm" style:rel-width="100%" svg:height="7.948cm" style:rel-height="scale" draw:z-index="9"><draw:image xlink:href="Pictures/10000001000002AB00000149F8E2F9B8.png" xlink:type="simple" xlink:show="embed" xlink:actuate="onLoad" draw:mime-type="image/png"/></draw:frame>Рисунок <text:sequence text:ref-name="refDrawing4" text:name="Drawing" text:formula="ooow:Drawing+1" style:num-format="1">5</text:sequence><text:s/>- Компиляция и работа программы</text:p></draw:text-box></draw:frame><text:soft-page-break/></text:p>
      <text:list text:continue-numbering="true" text:style-name="WWNum1">
        <text:list-item>
          <text:list>
            <text:list-item>
              <text:h text:style-name="P15" text:outline-level="2"><text:bookmark-start text:name="__RefHeading___Toc775_3015941620"/>4.<text:span text:style-name="T21">3</text:span> Выводы по интеграции<text:bookmark-end text:name="__RefHeading___Toc775_3015941620"/></text:h>
            </text:list-item>
          </text:list>
        </text:list-item>
      </text:list>
      <text:p text:style-name="P31"/>
      <text:p text:style-name="P2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<text:span text:style-name="T21">польза данной конфигурации </text:span><text:span text:style-name="T23">мала из-за слабого оборудования и маленькой модели.</text:span></text:p>
      <text:p text:style-name="P38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, <text:span text:style-name="T24">например Qwen3.6-27B на 27 млрд параметров</text:span>, что, в свою очередь, потребует более мощного серверного оборудования.</text:p>
      <text:list text:continue-numbering="true" text:style-name="WWNum1">
        <text:list-item>
          <text:h text:style-name="P39" text:outline-level="1"><text:bookmark-start text:name="__RefHeading___Toc1723_1378716561"/>Заключение<text:bookmark-end text:name="__RefHeading___Toc1723_1378716561"/></text:h>
        </text:list-item>
      </text:list>
      <text:p text:style-name="P40"/>
      <text:p text:style-name="P41">Цель курсовой работы — создание локального LLM сервера, его адмнистрирование и интеграция в рабочую среду была успешно выполнена. Для ее выполнения понадобились навыки, знания и опыт, полученные в ходе обучения и практик, а так же большое количество самостоятельного обучения </text:p>
      <text:list text:continue-numbering="true" text:style-name="WWNum1">
        <text:list-item>
          <text:h text:style-name="P42" text:outline-level="1"><text:bookmark-start text:name="__RefHeading___Toc6349_3015941620"/>Список использованных источников<text:bookmark-end text:name="__RefHeading___Toc6349_3015941620"/></text:h>
        </text:list-item>
      </text:list>
      <text:p text:style-name="P43"/>
      <text:p text:style-name="P44"><text:a xlink:type="simple" xlink:href="https://stackoverflow.co/company/press/archive/stack-overflow-2025-developer-survey" text:style-name="Internet_20_link" text:visited-style-name="Visited_20_Internet_20_Link">https://stackoverflow.co/company/press/archive/stack-overflow-2025-developer-survey</text:a></text:p>
      <text:p text:style-name="P45"><text:a xlink:type="simple" xlink:href="https://www.rdworldonline.com/how-developers-and-engineers-are-learning-to-work-with-ai-they-dont-fully-trust" text:style-name="Internet_20_link" text:visited-style-name="Visited_20_Internet_20_Link">https://www.rdworldonline.com/how-developers-and-engineers-are-learning-to-work-with-ai-they-dont-fully-trust</text:a></text:p>
      <text:p text:style-name="P45">https://neuralnoise.com///2026/harness-bench-wip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margin-top="0cm" fo:margin-bottom="0.21cm" style:contextual-spacing="false" fo:line-height="100%" style:page-number="auto">
        <style:tab-stops/>
      </style:paragraph-properties>
      <style:text-properties style:font-name="Times new roman1" fo:font-family="'Times new roman'" style:font-style-name="Курсив" style:font-family-generic="roman" fo:font-size="14pt" fo:font-style="normal" style:font-style-complex="oblique"/>
    </style:style>
    <style:style style:name="Содержание_20_курсовой" style:display-name="Содержание курсовой" style:family="paragraph" style:parent-style-name="Text_20_body" style:master-page-name="">
      <style:paragraph-properties fo:line-height="100%" fo:text-indent="0cm" style:auto-text-indent="false" style:page-number="auto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22</text:page-number><text:bookmark-end text:name="PageNumWizard_HEADER_Базовый1"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22T20:40:11.103148834</meta:print-date>
    <dc:date>2026-06-22T21:41:16.209440109</dc:date>
    <meta:editing-cycles>42</meta:editing-cycles>
    <meta:editing-duration>P1DT10H15M30S</meta:editing-duration>
    <meta:generator>LibreOffice/25.8.7.3$Linux_X86_64 LibreOffice_project/580$Build-3</meta:generator>
    <meta:printed-by>Файлы PDF</meta:printed-by>
    <meta:document-statistic meta:table-count="0" meta:image-count="5" meta:object-count="0" meta:page-count="22" meta:paragraph-count="136" meta:word-count="1960" meta:character-count="15818" meta:non-whitespace-character-count="13982"/>
    <meta:user-defined meta:name="AppVersion">15.0000</meta:user-defined>
  </office:meta>
</office:document-meta>
</file>