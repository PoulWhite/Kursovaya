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Жирный" style:font-family-generic="roman"/>
    <style:font-face style:name="Times new roman1" svg:font-family="'Times new roman'" style:font-adornments="Обычный" style:font-family-generic="roman"/>
  </office:font-face-decls>
  <office:automatic-styles>
    <style:style style:name="P1" style:family="paragraph" style:parent-style-name="Heading_20_1">
      <style:text-properties officeooo:rsid="0000ed47" officeooo:paragraph-rsid="0000ed47"/>
    </style:style>
    <style:style style:name="P2" style:family="paragraph" style:parent-style-name="Text_20_body">
      <style:text-properties officeooo:rsid="0000ed47" officeooo:paragraph-rsid="0000ed47"/>
    </style:style>
    <style:style style:name="P3" style:family="paragraph" style:parent-style-name="Heading_20_1">
      <style:paragraph-properties fo:text-align="center" style:justify-single-word="false" fo:break-before="page"/>
      <style:text-properties fo:font-size="14pt" fo:font-weight="bold" officeooo:rsid="0000ed47" officeooo:paragraph-rsid="0006a1b3" style:font-size-asian="14pt" style:font-weight-asian="bold" style:font-size-complex="14pt" style:font-weight-complex="bold"/>
    </style:style>
    <style:style style:name="P4" style:family="paragraph" style:parent-style-name="Contents_20_1">
      <style:paragraph-properties>
        <style:tab-stops>
          <style:tab-stop style:position="16.499cm" style:type="right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06a1b3" officeooo:paragraph-rsid="0006a1b3" style:font-size-asian="14pt" style:font-weight-asian="bold" style:font-size-complex="14pt" style:font-weight-complex="bold"/>
    </style:style>
    <style:style style:name="P7" style:family="paragraph" style:parent-style-name="Heading_20_1">
      <style:paragraph-properties fo:break-before="page"/>
      <style:text-properties officeooo:rsid="0006a1b3" officeooo:paragraph-rsid="0006a1b3"/>
    </style:style>
    <style:style style:name="P8" style:family="paragraph" style:parent-style-name="Text_20_body">
      <style:text-properties officeooo:paragraph-rsid="0006a1b3"/>
    </style:style>
    <style:style style:name="P9" style:family="paragraph" style:parent-style-name="Text_20_body">
      <style:text-properties style:text-underline-style="none" officeooo:rsid="0011b56a" fo:background-color="transparent"/>
    </style:style>
    <style:style style:name="P10" style:family="paragraph" style:parent-style-name="Heading_20_1">
      <style:paragraph-properties fo:break-before="page"/>
      <style:text-properties officeooo:rsid="00076450" officeooo:paragraph-rsid="00076450"/>
    </style:style>
    <style:style style:name="P11" style:family="paragraph" style:parent-style-name="Text_20_body">
      <style:text-properties officeooo:paragraph-rsid="00076450"/>
    </style:style>
    <style:style style:name="P12" style:family="paragraph" style:parent-style-name="Text_20_body">
      <style:text-properties officeooo:rsid="001174a0" officeooo:paragraph-rsid="001174a0"/>
    </style:style>
    <style:style style:name="P13" style:family="paragraph" style:parent-style-name="Heading_20_1">
      <style:paragraph-properties fo:break-before="page"/>
      <style:text-properties officeooo:rsid="00076d9f" officeooo:paragraph-rsid="00076d9f"/>
    </style:style>
    <style:style style:name="P14" style:family="paragraph" style:parent-style-name="Text_20_body">
      <style:text-properties officeooo:paragraph-rsid="000d4ddc"/>
    </style:style>
    <style:style style:name="P15" style:family="paragraph" style:parent-style-name="Text_20_body">
      <style:text-properties officeooo:rsid="000d4ddc" officeooo:paragraph-rsid="000d4ddc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background-color="transparent"/>
    </style:style>
    <style:style style:name="P19" style:family="paragraph" style:parent-style-name="Heading_20_2">
      <style:text-properties officeooo:paragraph-rsid="001174a0"/>
    </style:style>
    <style:style style:name="P20" style:family="paragraph" style:parent-style-name="Text_20_body">
      <style:text-properties officeooo:paragraph-rsid="001174a0"/>
    </style:style>
    <style:style style:name="P21" style:family="paragraph" style:parent-style-name="Text_20_body" style:list-style-name="L3">
      <style:text-properties officeooo:paragraph-rsid="001174a0"/>
    </style:style>
    <style:style style:name="P22" style:family="paragraph" style:parent-style-name="Text_20_body">
      <style:text-properties officeooo:paragraph-rsid="0011b56a"/>
    </style:style>
    <style:style style:name="P23" style:family="paragraph" style:parent-style-name="Text_20_body" style:list-style-name="L4">
      <style:text-properties officeooo:paragraph-rsid="00127aad"/>
    </style:style>
    <style:style style:name="P24" style:family="paragraph" style:parent-style-name="Text_20_body">
      <style:text-properties officeooo:paragraph-rsid="00127aad"/>
    </style:style>
    <style:style style:name="P25" style:family="paragraph" style:parent-style-name="Heading_20_2">
      <style:text-properties officeooo:paragraph-rsid="00127aad"/>
    </style:style>
    <style:style style:name="P26" style:family="paragraph" style:parent-style-name="Text_20_body">
      <style:text-properties officeooo:paragraph-rsid="001330e2"/>
    </style:style>
    <style:style style:name="P27" style:family="paragraph" style:parent-style-name="Text_20_body" style:list-style-name="L5">
      <style:text-properties officeooo:paragraph-rsid="00137023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officeooo:paragraph-rsid="00155969"/>
    </style:style>
    <style:style style:name="P30" style:family="paragraph" style:parent-style-name="Text_20_body">
      <style:paragraph-properties fo:margin-left="0cm" fo:text-indent="0cm" style:auto-text-indent="false"/>
      <style:text-properties officeooo:paragraph-rsid="00155969"/>
    </style:style>
    <style:style style:name="P31" style:family="paragraph" style:parent-style-name="Heading_20_2">
      <style:paragraph-properties fo:break-before="page"/>
      <style:text-properties officeooo:paragraph-rsid="00168c56"/>
    </style:style>
    <style:style style:name="P32" style:family="paragraph" style:parent-style-name="Text_20_body">
      <style:text-properties officeooo:paragraph-rsid="0020996b"/>
    </style:style>
    <style:style style:name="P33" style:family="paragraph" style:parent-style-name="Text_20_body">
      <style:text-properties officeooo:paragraph-rsid="00168c56"/>
    </style:style>
    <style:style style:name="P34" style:family="paragraph" style:parent-style-name="Heading_20_1">
      <style:text-properties officeooo:paragraph-rsid="00168c56"/>
    </style:style>
    <style:style style:name="P35" style:family="paragraph" style:parent-style-name="Heading_20_2">
      <style:text-properties officeooo:paragraph-rsid="00176e45"/>
    </style:style>
    <style:style style:name="P36" style:family="paragraph" style:parent-style-name="Text_20_body" style:list-style-name="L6">
      <style:text-properties officeooo:paragraph-rsid="00176e45"/>
    </style:style>
    <style:style style:name="P37" style:family="paragraph" style:parent-style-name="Heading_20_2">
      <style:text-properties officeooo:paragraph-rsid="001b8d67"/>
    </style:style>
    <style:style style:name="P38" style:family="paragraph" style:parent-style-name="Text_20_body">
      <style:text-properties fo:background-color="transparent"/>
    </style:style>
    <style:style style:name="P39" style:family="paragraph" style:parent-style-name="Heading_20_2">
      <style:text-properties fo:background-color="transparent"/>
    </style:style>
    <style:style style:name="P40" style:family="paragraph" style:parent-style-name="Text_20_body" style:list-style-name="L7">
      <style:text-properties officeooo:rsid="0021b5c8" officeooo:paragraph-rsid="0021b5c8"/>
    </style:style>
    <style:style style:name="P41" style:family="paragraph" style:parent-style-name="Text_20_body" style:list-style-name="L7">
      <style:paragraph-properties fo:margin-left="0cm" fo:text-indent="0cm" style:auto-text-indent="false"/>
      <style:text-properties officeooo:rsid="0021b5c8" officeooo:paragraph-rsid="0021b5c8"/>
    </style:style>
    <style:style style:name="P4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06a1b3"/>
    </style:style>
    <style:style style:name="T2" style:family="text">
      <style:text-properties officeooo:rsid="00076d9f"/>
    </style:style>
    <style:style style:name="T3" style:family="text">
      <style:text-properties officeooo:rsid="001174a0"/>
    </style:style>
    <style:style style:name="T4" style:family="text">
      <style:text-properties officeooo:rsid="0011b56a"/>
    </style:style>
    <style:style style:name="T5" style:family="text">
      <style:text-properties style:text-underline-style="none" officeooo:rsid="0011b56a" fo:background-color="transparent" loext:char-shading-value="0"/>
    </style:style>
    <style:style style:name="T6" style:family="text">
      <style:text-properties style:text-underline-style="none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d4ddc"/>
    </style:style>
    <style:style style:name="T10" style:family="text">
      <style:text-properties fo:font-weight="normal" officeooo:rsid="001174a0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27aad" fo:background-color="transparent" loext:char-shading-value="0" style:font-weight-asian="normal" style:font-weight-complex="normal"/>
    </style:style>
    <style:style style:name="T13" style:family="text">
      <style:text-properties officeooo:rsid="001174a0" fo:background-color="transparent" loext:char-shading-value="0"/>
    </style:style>
    <style:style style:name="T14" style:family="text">
      <style:text-properties fo:font-weight="normal" officeooo:rsid="001174a0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11b56a" style:font-weight-asian="normal" style:font-weight-complex="normal"/>
    </style:style>
    <style:style style:name="T16" style:family="text">
      <style:text-properties fo:font-weight="normal" officeooo:rsid="00127aad" style:font-weight-asian="normal" style:font-weight-complex="normal"/>
    </style:style>
    <style:style style:name="T17" style:family="text">
      <style:text-properties officeooo:rsid="00127aad"/>
    </style:style>
    <style:style style:name="T18" style:family="text">
      <style:text-properties fo:font-weight="normal" officeooo:rsid="0020996b" style:font-weight-asian="normal" style:font-weight-complex="normal"/>
    </style:style>
    <style:style style:name="T19" style:family="text">
      <style:text-properties fo:font-weight="normal" officeooo:rsid="001330e2" style:font-weight-asian="normal" style:font-weight-complex="normal"/>
    </style:style>
    <style:style style:name="T20" style:family="text">
      <style:text-properties style:text-underline-style="none" fo:font-weight="normal" officeooo:rsid="001330e2" style:font-weight-asian="normal" style:font-weight-complex="normal"/>
    </style:style>
    <style:style style:name="T21" style:family="text">
      <style:text-properties fo:font-weight="normal" officeooo:rsid="00155969" style:font-weight-asian="normal" style:font-weight-complex="normal"/>
    </style:style>
    <style:style style:name="T22" style:family="text">
      <style:text-properties officeooo:rsid="00168c56"/>
    </style:style>
    <style:style style:name="T23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/>
    </style:style>
    <style:style style:name="T24" style:family="text">
      <style:text-properties officeooo:rsid="00176e45"/>
    </style:style>
    <style:style style:name="T25" style:family="text">
      <style:text-properties fo:font-weight="normal" officeooo:rsid="00176e45" style:font-weight-asian="normal" style:font-weight-complex="normal"/>
    </style:style>
    <style:style style:name="T26" style:family="text">
      <style:text-properties fo:font-weight="normal" officeooo:rsid="00176e45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19d26d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1b8d67" fo:background-color="transparent" loext:char-shading-value="0" style:font-weight-asian="normal" style:font-weight-complex="normal"/>
    </style:style>
    <style:style style:name="T29" style:family="text">
      <style:text-properties officeooo:rsid="0021b5c8"/>
    </style:style>
    <style:style style:name="T30" style:family="text">
      <style:text-properties officeooo:rsid="00234f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bookmark-start text:name="__RefHeading___Toc102_3548392200"/>Титульный лист<text:bookmark-end text:name="__RefHeading___Toc102_3548392200"/></text:h>
      <text:p text:style-name="P2"/>
      <text:p text:style-name="P2">По дисциплине пм 01 мдк 01 мдк 02</text:p>
      <text:p text:style-name="P2">Разветртыване LLM сервера для разработки</text:p>
      <text:p text:style-name="P2"><office:annotation loext:resolved="false"><dc:creator>&lt;анонимный&gt;</dc:creator><dc:date>2026-06-05T21:52:19.527085903</dc:date><text:p text:style-name="Comment">Доделать титульник по кайфу</text:p></office:annotation></text:p>
      <text:p text:style-name="P2"/>
      <text:h text:style-name="P3" text:outline-level="1"><text:bookmark-start text:name="__RefHeading___Toc104_3548392200 Копия 1"/>Содержани<text:span text:style-name="T1">е</text:span><text:bookmark-end text:name="__RefHeading___Toc104_3548392200 Копия 1"/></text:h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102_3548392200" office:name="Титульный лист" text:style-name="Index_20_Link" text:visited-style-name="Index_20_Link">Титульный лист<text:tab/>1</text:a></text:p>
          <text:p text:style-name="P4"><text:a xlink:type="simple" xlink:href="#__RefHeading___Toc104_3548392200%20%D0%9A%D0%BE%D0%BF%D0%B8%D1%8F%201" office:name="Содержание" text:style-name="Index_20_Link" text:visited-style-name="Index_20_Link">Содержание<text:tab/>2</text:a></text:p>
          <text:p text:style-name="P4"><text:a xlink:type="simple" xlink:href="#__RefHeading___Toc3200_3548392200" office:name="Термины и определения" text:style-name="Index_20_Link" text:visited-style-name="Index_20_Link">Термины и определения<text:tab/>3</text:a></text:p>
          <text:p text:style-name="P4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4</text:a></text:p>
          <text:p text:style-name="P4"><text:a xlink:type="simple" xlink:href="#__RefHeading___Toc4210_3548392200" office:name="Введение" text:style-name="Index_20_Link" text:visited-style-name="Index_20_Link">Введение<text:tab/>5</text:a></text:p>
          <text:p text:style-name="P4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7</text:a></text:p>
          <text:p text:style-name="P5"><text:a xlink:type="simple" xlink:href="#__RefHeading___Toc868_2141837623" office:name="1.1 Olama" text:style-name="Index_20_Link" text:visited-style-name="Index_20_Link">1.1 Olama<text:tab/>7</text:a></text:p>
          <text:p text:style-name="P5"><text:a xlink:type="simple" xlink:href="#__RefHeading___Toc735_118244425" office:name="1.2 Llama.cpp" text:style-name="Index_20_Link" text:visited-style-name="Index_20_Link">1.2 Llama.cpp<text:tab/>8</text:a></text:p>
          <text:p text:style-name="P5"><text:a xlink:type="simple" xlink:href="#__RefHeading___Toc630_3774095318" office:name="1.3 Вывод анализа" text:style-name="Index_20_Link" text:visited-style-name="Index_20_Link">1.3 Вывод анализа<text:tab/>9</text:a></text:p>
          <text:p text:style-name="P4"><text:a xlink:type="simple" xlink:href="#__RefHeading___Toc632_3774095318" office:name="2 Определение минимальных аппаратных требований к серверной платформе" text:style-name="Index_20_Link" text:visited-style-name="Index_20_Link">2 Определение минимальных аппаратных требований к серверной платформе<text:tab/>9</text:a></text:p>
          <text:p text:style-name="P5"><text:a xlink:type="simple" xlink:href="#__RefHeading___Toc634_3774095318" office:name="2.1 Факторы, определяющие аппаратные требования" text:style-name="Index_20_Link" text:visited-style-name="Index_20_Link">2.1 Факторы, определяющие аппаратные требования<text:tab/>9</text:a></text:p>
          <text:p text:style-name="P5"><text:a xlink:type="simple" xlink:href="#__RefHeading___Toc636_3774095318" office:name="2.2 Расчёт требований к оперативной памяти" text:style-name="Index_20_Link" text:visited-style-name="Index_20_Link">2.2 Расчёт требований к оперативной памяти<text:tab/>10</text:a></text:p>
        </text:index-body>
      </text:table-of-content>
      <text:p text:style-name="P6"/>
      <text:p text:style-name="P6"/>
      <text:h text:style-name="P7" text:outline-level="1"><text:bookmark-start text:name="__RefHeading___Toc3200_3548392200"/>Термины и определения<text:bookmark-end text:name="__RefHeading___Toc3200_3548392200"/></text:h>
      <text:p text:style-name="P8"/>
      <text:p text:style-name="P8">В настоящей <text:span text:style-name="T2">курсовой работе</text:span> (проекте) применяют следующие термины с соответствующими определениями:</text:p>
      <text:p text:style-name="Text_20_body"><text:span text:style-name="T3">API (</text:span>Application Programming Interface<text:span text:style-name="T3">) - </text:span>программный интерфейс, то есть описание способов взаимодействия одной компьютерной программы с другими.</text:p>
      <text:p text:style-name="Text_20_body">AI - такж<text:span text:style-name="T4">е</text:span> ИИ, искусственный разум, в самом широком смысле — научно-технологическая область, занимающаяся изучением и созданием интеллектуальных сущностей.</text:p>
      <text:p text:style-name="Text_20_body"><text:span text:style-name="T4">LLM (</text:span>large language model<text:span text:style-name="T4">) - </text:span><text:span text:style-name="T5">Большая языковая модель </text:span><text:span text:style-name="T6">основанная на</text:span><text:bookmark text:name="mwCg"/><text:span text:style-name="T6"> </text:span><text:span text:style-name="T5">нейроной сети </text:span><text:span text:style-name="T6">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6"> </text:span><text:span text:style-name="T5">текста </text:span><text:span text:style-name="T6">методами </text:span><text:span text:style-name="T5">самообучения.</text:span></text:p>
      <text:p text:style-name="P9"/>
      <text:p text:style-name="P9"/>
      <text:p text:style-name="P9"/>
      <text:p text:style-name="P9"/>
      <text:p text:style-name="P9"><office:annotation loext:resolved="false"><dc:creator>&lt;анонимный&gt;</dc:creator><dc:date>2026-06-05T21:53:47.474135755</dc:date><text:p text:style-name="Comment">По алфавиту</text:p></office:annotation></text:p>
      <text:h text:style-name="P10" text:outline-level="1"><text:bookmark-start text:name="__RefHeading___Toc104_3548392200"/>Перечень сокращений и обозначений<text:bookmark-end text:name="__RefHeading___Toc104_3548392200"/></text:h>
      <text:p text:style-name="P11"/>
      <text:p text:style-name="P11">В настоящей <text:span text:style-name="T2">курсовой работе</text:span> (проекте) применяют следующие сокращения и обозначения:</text:p>
      <text:p text:style-name="P12"/>
      <text:h text:style-name="P13" text:outline-level="1"><text:bookmark-start text:name="__RefHeading___Toc4210_3548392200"/>Введение<text:bookmark-end text:name="__RefHeading___Toc4210_3548392200"/></text:h>
      <text:p text:style-name="P14">Современные IT-компании активно внедряют инструменты искусственного интеллекта в процессы разработки. Согласно <text:span text:style-name="T7">исследованию</text:span> Stack Overflow 2025 года, 84% разработчиков используют или планируют использовать AI-инструменты, при этом 51% применяют их ежедневно. <text:span text:style-name="T7">Исследование</text:span><text:span text:style-name="T7"><office:annotation loext:resolved="false"><dc:creator>&lt;анонимный&gt;</dc:creator><dc:date>2026-06-05T21:54:18.217521566</dc:date><text:p text:style-name="Comment">Возможно 1 исслдования хватит </text:p></office:annotation></text:span><text:span text:style-name="T7"> C</text:span>omplexity Science Hub показывает, что доля AI-ассистированного кода на GitHub выросла с 5% в 2022 году до 29% к концу 2024 года.</text:p>
      <text:p text:style-name="P14">Однако рост популярности облачных AI-решений (GitHub Copilot, ChatGPT) обостряет проблему безопасности интеллектуальной собственности. Передача фрагментов кодовой базы сторонним серверам создаёт риски утечки конфиденциальных алгоритмов и коммерческой тайны. <text:span text:style-name="T7">Эксперты отмечают</text:span><text:span text:style-name="T7"><office:annotation loext:resolved="false"><dc:creator>&lt;анонимный&gt;</dc:creator><dc:date>2026-06-05T21:54:07.585306027</dc:date><text:p text:style-name="Comment">Добавить ссылки на исследования</text:p></office:annotation></text:span><text:span text:style-name="T7">, </text:span>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Text_20_body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14">Существует ряд open-source инструментов для локального запуска моделей (Ollama, llama.cpp, vLLM)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15"><text:soft-page-break/>Объект и предмет исследования:</text:p>
      <text:list text:style-name="L1">
        <text:list-item>
          <text:list>
            <text:list-item>
              <text:p text:style-name="P16"><text:span text:style-name="Strong_20_Emphasis"><text:span text:style-name="T8">Объект исследования</text:span></text:span>: процесс организации безопасной локальной инфраструктуры для использования LLM в разработке ПО.</text:p>
            </text:list-item>
            <text:list-item>
              <text:p text:style-name="P16"><text:span text:style-name="T9">Предмет исследования: </text:span>методы развёртывания, администрирования и интеграции локального LLM-сервера (на базе llama-server) в рабочую среду IT-специалистов, в частности - подключение к Code OSS.</text:p>
            </text:list-item>
          </text:list>
        </text:list-item>
      </text:list>
      <text:p text:style-name="Text_20_body"><text:span text:style-name="Strong_20_Emphasis"><text:span text:style-name="T8">Цель работы: разработать и экспериментально подтвердить работоспособность локального LLM-сервера на базе llama-server, обеспечить его администрирование в условиях локальной сети и выполнить интеграцию со средой разработки Code OSS.</text:span></text:span></text:p>
      <text:p text:style-name="Text_20_body"><text:span text:style-name="Strong_20_Emphasis"><text:span text:style-name="T8">Задачи:</text:span></text:span><text:span text:style-name="Strong_20_Emphasis"><text:span text:style-name="T8"><office:annotation loext:resolved="false"><dc:creator>&lt;анонимный&gt;</dc:creator><dc:date>2026-06-05T22:00:06.762961236</dc:date><text:p text:style-name="Comment">Куда то добавить мою конфигурацию</text:p></office:annotation></text:span></text:span></text:p>
      <text:list text:style-name="L2">
        <text:list-item>
          <text:p text:style-name="P17">Провести анализ существующих решений для локального развёртывания LLM и обосновать выбор llama-server.</text:p>
        </text:list-item>
        <text:list-item>
          <text:p text:style-name="P18">Определить минимальные аппаратные требования и выполнить установку и настройку llama-server в локальной сети.</text:p>
        </text:list-item>
        <text:list-item>
          <text:p text:style-name="P18">Разработать конфигурацию сервера, обеспечивающую стабильную работу (управление контекстом, квантование, распределение нагрузки).</text:p>
        </text:list-item>
        <text:list-item>
          <text:p text:style-name="P17"><text:span text:style-name="T7">Реализовать интеграцию локального LLM-сервера с Code OSS на</text:span> клиентском компьютере.</text:p>
        </text:list-item>
        <text:list-item>
          <text:p text:style-name="P17">Выполнить экспериментальную проверку работоспособности решения (генерация кода, автодополнение).</text:p>
        </text:list-item>
        <text:list-item>
          <text:p text:style-name="P18">Сформулировать рекомендации по администрированию сервера (мониторинг ресурсов, управление моделями, отказоустойчивость).</text:p>
        </text:list-item>
      </text:list>
      <text:h text:style-name="Heading_20_1" text:outline-level="1"><text:bookmark-start text:name="__RefHeading___Toc866_2141837623"/><text:soft-page-break/><text:span text:style-name="Strong_20_Emphasis"><text:span text:style-name="T3">1 </text:span></text:span><text:span text:style-name="Strong_20_Emphasis">Анализ решений для локального развёртывания LLM и обоснование выбора llama.cpp</text:span><text:bookmark-end text:name="__RefHeading___Toc866_2141837623"/></text:h>
      <text:p text:style-name="Text_20_body"><text:span text:style-name="Strong_20_Emphasis"/></text:p>
      <text:p text:style-name="Text_20_body"><text:span text:style-name="Strong_20_Emphasis"><text:span text:style-name="T8">Для организации локального LLM-сервера, доступного нескольким пользователям в корпоративной сети, наиболее актуальными являются два решения: Ollama и llama.cpp (с компонентом </text:span></text:span><text:span text:style-name="Strong_20_Emphasis"><text:span text:style-name="T10">llama-server</text:span></text:span><text:span text:style-name="Strong_20_Emphasis"><text:span text:style-name="T8"> ). Оба инструмента базируются на ед</text:span></text:span><text:span text:style-name="Strong_20_Emphasis"><text:span text:style-name="T11">иной технологической основе (формат GGUF, оптимизации CPU/GPU), но принципиально различаются по архитектуре и подходу к администрированию. </text:span></text:span><text:span text:style-name="Strong_20_Emphasis"><text:span text:style-name="T11">// </text:span></text:span><text:span text:style-name="Strong_20_Emphasis"><text:span text:style-name="T12">вставить источники на сравнение olama vs llama.cpp</text:span></text:span></text:p>
      <text:p text:style-name="Text_20_body"><text:span text:style-name="Strong_20_Emphasis"><text:span text:style-name="T11"/></text:span></text:p>
      <text:h text:style-name="P19" text:outline-level="2"><text:bookmark-start text:name="__RefHeading___Toc868_2141837623"/><text:span text:style-name="Strong_20_Emphasis"><text:span text:style-name="T13">1.1 Olama</text:span></text:span><text:bookmark-end text:name="__RefHeading___Toc868_2141837623"/></text:h>
      <text:p text:style-name="P20"><text:span text:style-name="Strong_20_Emphasis"/></text:p>
      <text:p text:style-name="Text_20_body"><text:span text:style-name="Strong_20_Emphasis"><text:span text:style-name="T8">Ollama</text:span></text:span><text:span text:style-name="Strong_20_Emphasis"><text:span text:style-name="T11"> позиционируется как «LLM-движок для разработчиков», предлагая </text:span></text:span><text:span text:style-name="Strong_20_Emphasis"><text:span text:style-name="T11">максимально простой пут</text:span></text:span><text:span text:style-name="Strong_20_Emphasis"><text:span text:style-name="T11">ь запуска моделей. Однако при использовании в многопользовательском сценарии проявляются его </text:span></text:span><text:span text:style-name="Strong_20_Emphasis"><text:span text:style-name="T14">некоторые недостатки</text:span></text:span></text:p>
      <text:p text:style-name="P20"><text:span text:style-name="Strong_20_Emphasis"><text:span text:style-name="T14">Достоинства:</text:span></text:span></text:p>
      <text:list text:style-name="L3">
        <text:list-item>
          <text:list>
            <text:list-item>
              <text:p text:style-name="P21"><text:span text:style-name="Strong_20_Emphasis"><text:span text:style-name="T10">Установка одной командой, готовые пакеты для всех ОС</text:span></text:span></text:p>
            </text:list-item>
            <text:list-item>
              <text:p text:style-name="P21"><text:span text:style-name="Strong_20_Emphasis"><text:span text:style-name="T10">Встроенный реестр моделей</text:span></text:span></text:p>
            </text:list-item>
            <text:list-item>
              <text:p text:style-name="P21"><text:span text:style-name="Strong_20_Emphasis"><text:span text:style-name="T10">Open-AI совместимый API</text:span></text:span></text:p>
            </text:list-item>
          </text:list>
        </text:list-item>
      </text:list>
      <text:p text:style-name="P22"><text:span text:style-name="Strong_20_Emphasis"><text:span text:style-name="T15">Недостатки:</text:span></text:span></text:p>
      <text:list text:style-name="L4">
        <text:list-item>
          <text:list>
            <text:list-item>
              <text:p text:style-name="P23"><text:span text:style-name="Strong_20_Emphasis"><text:span text:style-name="T16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23"><text:span text:style-name="Strong_20_Emphasis"><text:span text:style-name="T16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23"><text:span text:style-name="Strong_20_Emphasis"><text:span text:style-name="T16">Отсутсвие встроенного веб-интерфейса </text:span></text:span></text:p>
            </text:list-item>
            <text:list-item>
              <text:p text:style-name="P23"><text:soft-page-break/><text:span text:style-name="Strong_20_Emphasis"><text:span text:style-name="T16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24"><text:span text:style-name="Strong_20_Emphasis"><text:span text:style-name="T16"/></text:span></text:p>
      <text:h text:style-name="P25" text:outline-level="2"><text:bookmark-start text:name="__RefHeading___Toc735_118244425"/><text:span text:style-name="Strong_20_Emphasis"><text:span text:style-name="T17">1.2 Llama.cpp</text:span></text:span><text:bookmark-end text:name="__RefHeading___Toc735_118244425"/></text:h>
      <text:p text:style-name="Text_20_body"><text:span text:style-name="Strong_20_Emphasis"><text:span text:style-name="T8"/></text:span></text:p>
      <text:p text:style-name="Text_20_body"><text:span text:style-name="Strong_20_Emphasis"><text:span text:style-name="T8">llama-server — это встроенный HTTP-сервер, входящий в состав проекта llama.cpp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</text:span></text:span><text:span text:style-name="Strong_20_Emphasis"><text:span text:style-name="T18">организации</text:span></text:span><text:span text:style-name="Strong_20_Emphasis"><text:span text:style-name="T8">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26"><text:span text:style-name="Strong_20_Emphasis"><text:span text:style-name="T19">Достоинства:</text:span></text:span></text:p>
      <text:list text:style-name="L5">
        <text:list-item>
          <text:list>
            <text:list-item>
              <text:p text:style-name="P27"><text:span text:style-name="Strong_20_Emphasis"><text:span text:style-name="T19">Параллельная обработка сессий</text:span></text:span><text:span text:style-name="Strong_20_Emphasis"><text:span text:style-name="T20"> — </text:span></text:span><text:span text:style-name="Strong_20_Emphasis"><text:span text:style-name="T19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28"><text:span text:style-name="Strong_20_Emphasis"><text:span text:style-name="T8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29"><text:span text:style-name="Strong_20_Emphasis"><text:span text:style-name="T21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29"><text:span text:style-name="Strong_20_Emphasis"><text:span text:style-name="T21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28"><text:span text:style-name="Strong_20_Emphasis"><text:span text:style-name="T8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30"><text:span text:style-name="Strong_20_Emphasis"><text:span text:style-name="T21"/></text:span></text:p>
      <text:h text:style-name="P31" text:outline-level="2"><text:bookmark-start text:name="__RefHeading___Toc630_3774095318"/><text:span text:style-name="Strong_20_Emphasis"><text:span text:style-name="T22">1.3 Вывод анализа </text:span></text:span><text:bookmark-end text:name="__RefHeading___Toc630_3774095318"/></text:h>
      <text:p text:style-name="P32"><text:span text:style-name="Strong_20_Emphasis"><text:span text:style-name="T8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32"><text:span text:style-name="Strong_20_Emphasis"><text:span text:style-name="T8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33"><text:span text:style-name="Strong_20_Emphasis"/></text:p>
      <text:h text:style-name="P34" text:outline-level="1"><text:bookmark-start text:name="__RefHeading___Toc632_3774095318"/><text:span text:style-name="Strong_20_Emphasis"><text:span text:style-name="T22">2 Определение минимальных аппаратных требований к серверной платформе</text:span></text:span><text:bookmark-end text:name="__RefHeading___Toc632_3774095318"/></text:h>
      <text:p text:style-name="P33"><text:span text:style-name="Strong_20_Emphasis"><text:span text:style-name="T23"/></text:span></text:p>
      <text:p text:style-name="Text_20_body"><text:span text:style-name="Strong_20_Emphasis"><text:span text:style-name="T8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h text:style-name="P35" text:outline-level="2"><text:bookmark-start text:name="__RefHeading___Toc634_3774095318"/><text:span text:style-name="Strong_20_Emphasis"><text:span text:style-name="T24">2.1 Факторы, определяющие аппаратные требования</text:span></text:span><text:bookmark-end text:name="__RefHeading___Toc634_3774095318"/></text:h>
      <text:p text:style-name="Text_20_body"><text:span text:style-name="Strong_20_Emphasis"><text:span text:style-name="T8">Аппаратные требования к LLM-серверу определяются тремя основными группами факторов:</text:span></text:span></text:p>
      <text:p text:style-name="Text_20_body"><text:span text:style-name="Strong_20_Emphasis"><text:span text:style-name="T8"/></text:span></text:p>
      <text:list text:style-name="L6">
        <text:list-item>
          <text:list>
            <text:list-item>
              <text:p text:style-name="P36"><text:soft-page-break/><text:span text:style-name="Strong_20_Emphasis"><text:span text:style-name="T25">Характерискика модели — о</text:span></text:span><text:span text:style-name="Strong_20_Emphasis"><text:span text:style-name="T26">сновной объём потребляемой памяти зависит от выбранной модели и типа </text:span></text:span><text:span text:style-name="Strong_20_Emphasis"><text:span text:style-name="T26">квантования</text:span></text:span><text:span text:style-name="Strong_20_Emphasis"><text:span text:style-name="T26">.</text:span></text:span><text:span text:style-name="Strong_20_Emphasis"><text:span text:style-name="T27"> </text:span></text:span><text:span text:style-name="Strong_20_Emphasis"><text:span text:style-name="T26">Однако при загрузке в оперативную память требуется дополнительное пространство для </text:span></text:span><text:span text:style-name="Strong_20_Emphasis"><text:span text:style-name="T26">KV-кэша</text:span></text:span><text:span text:style-name="Strong_20_Emphasis"><text:span text:style-name="T26">, размер которого пропорционален контекстному окну.</text:span></text:span></text:p>
            </text:list-item>
            <text:list-item>
              <text:p text:style-name="P36"><text:span text:style-name="Strong_20_Emphasis"><text:span text:style-name="T26">Многопользовательская нагрузка. При параллельной обработке запросов от нескольких пользователей требования к памяти</text:span></text:span><text:span text:style-name="Strong_20_Emphasis"><text:span text:style-name="T27">, </text:span></text:span><text:span text:style-name="Strong_20_Emphasis"><text:span text:style-name="T27">GPU</text:span></text:span><text:span text:style-name="Strong_20_Emphasis"><text:span text:style-name="T27"> и</text:span></text:span><text:span text:style-name="Strong_20_Emphasis"><text:span text:style-name="T26"> </text:span></text:span><text:span text:style-name="Strong_20_Emphasis"><text:span text:style-name="T26">CPU</text:span></text:span><text:span text:style-name="Strong_20_Emphasis"><text:span text:style-name="T26"> возрастают пропорционально количеству одновременных сессий. Каждый параллельный слот требует выделения</text:span></text:span><text:span text:style-name="Strong_20_Emphasis"><text:span text:style-name="T25"> собственного KV-кэша </text:span></text:span></text:p>
            </text:list-item>
            <text:list-item>
              <text:p text:style-name="P36"><text:span text:style-name="Strong_20_Emphasis"><text:span text:style-name="T25">Размер контекстного окна. Увеличение контекстного окна существенно повышает потребление памяти.</text:span></text:span></text:p>
            </text:list-item>
          </text:list>
        </text:list-item>
      </text:list>
      <text:h text:style-name="P37" text:outline-level="2"><text:bookmark-start text:name="__RefHeading___Toc636_3774095318"/><text:span text:style-name="Strong_20_Emphasis">2.2 Расчёт требований к оперативной памяти</text:span><text:bookmark-end text:name="__RefHeading___Toc636_3774095318"/></text:h>
      <text:p text:style-name="Text_20_body"><text:span text:style-name="Strong_20_Emphasis"><text:span text:style-name="T11">Общий объём оперативной памяти для llama-server можно рассчитать по формуле </text:span></text:span><text:span text:style-name="Strong_20_Emphasis"><text:span text:style-name="T28">1</text:span></text:span><text:span text:style-name="Strong_20_Emphasis"><text:span text:style-name="T11">:</text:span></text:span></text:p>
      <text:p text:style-name="P38">RAM_total = Model_size_loaded + KV_cache_size × N_parallel_slots + Overhead<office:annotation loext:resolved="false"><dc:creator>&lt;анонимный&gt;</dc:creator><dc:date>2026-06-05T22:01:23.839807654</dc:date><text:p text:style-name="Comment">Норм формулу сделать </text:p></office:annotation></text:p>
      <text:p text:style-name="P38">Согласно документации llama.cpp, для базового запуска достаточно 4 ГБ ОЗУ</text:p>
      <text:h text:style-name="P39" text:outline-level="2">2.3 Требования к процессору</text:h>
      <text:p text:style-name="Text_20_body">llama.cpp эффективно работает как на x86_64, так и на AArch64 <office:annotation loext:resolved="false"><dc:creator>&lt;анонимный&gt;</dc:creator><dc:date>2026-06-05T22:02:38.720839992</dc:date><text:p text:style-name="Comment">Добавить определение архитектур</text:p></office:annotation>архитектурах.</text:p>
      <text:p text:style-name="Text_20_body">Для многопользовательских сценариев на 32-ядерных серверах рекомендуется использовать CPU affinity и NUMA-aware оптимизации . При использовании GPU достаточно 2-4 ядер CPU для управления передачей данных.<office:annotation loext:resolved="false"><dc:creator>&lt;анонимный&gt;</dc:creator><dc:date>2026-06-05T22:03:41.665783296</dc:date><text:p text:style-name="Comment">Из-за специфики работы llama с потоками процессора</text:p></office:annotation></text:p>
      <text:h text:style-name="Heading_20_2" text:outline-level="2"><text:soft-page-break/>2.4 Требования к дисковому пространству</text:h>
      <text:p text:style-name="Text_20_body">Дисковое пространство необходимо для хранения файлов моделей и логов сервера:</text:p>
      <text:list text:style-name="L7">
        <text:list-item>
          <text:list>
            <text:list-item>
              <text:p text:style-name="P40">Модель, вес зависит от кол-ва параметров</text:p>
            </text:list-item>
            <text:list-item>
              <text:p text:style-name="P40">Логирование: лучше выделить 5-10 ГБ для хронологических логов</text:p>
            </text:list-item>
            <text:list-item>
              <text:p text:style-name="P40">Сиситемные требования ОС: 20 - 40 ГБ</text:p>
              <text:p text:style-name="P41">Рекомендуемый обьем: от 32ГБ + вес модели.</text:p>
            </text:list-item>
          </text:list>
        </text:list-item>
      </text:list>
      <text:h text:style-name="Heading_20_2" text:outline-level="2">2.5 Сетевые требования</text:h>
      <text:p text:style-name="P42">Для работы в локальной сети организации <text:span text:style-name="T29">серьезных требований нет. Пропускная способнойсть от 100 Мбит/с — этого достаточно для передачи текстовых данных. </text:span><text:span text:style-name="T30">Для упрощения настройки рекомендуется статический IP адресс. Сервер привязывается к порту (по умолчанию 8080) и интерфейсу 0.0.0.0 для обеспечения доступности из се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Жирный" style:font-family-generic="roman"/>
    <style:font-face style:name="Times new roman1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00%" fo:text-align="center" style:justify-single-word="false" style:register-true="true" style:page-number="auto" style:snap-to-layout-grid="false"/>
      <style:text-properties fo:text-transform="uppercase" style:font-name="Times new roman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indent="1.251cm" style:auto-text-indent="false" style:page-number="auto"/>
      <style:text-properties style:font-name="Times new roman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11</text:page-number><text:bookmark-end text:name="PageNumWizard_HEADER_Базовый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.749607998</meta:creation-date>
    <dc:date>2026-06-05T22:19:03.760049510</dc:date>
    <meta:editing-duration>P1DT4H37M3S</meta:editing-duration>
    <meta:editing-cycles>16</meta:editing-cycles>
    <meta:generator>LibreOffice/25.8.7.3$Linux_X86_64 LibreOffice_project/580$Build-3</meta:generator>
    <meta:document-statistic meta:table-count="0" meta:image-count="0" meta:object-count="0" meta:page-count="11" meta:paragraph-count="88" meta:word-count="1128" meta:character-count="9498" meta:non-whitespace-character-count="8464"/>
  </office:meta>
</office:document-meta>
</file>